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style:rel-width="100%" fo:margin-left="-0.191cm" fo:margin-top="0cm" fo:margin-bottom="0cm" table:align="left" style:writing-mode="page"/>
    </style:style>
    <style:style style:name="Table1.A" style:family="table-column">
      <style:table-column-properties style:column-width="3.627cm" style:rel-column-width="13107*"/>
    </style:style>
    <style:style style:name="Table1.1" style:family="table-row">
      <style:table-row-properties fo:keep-together="auto"/>
    </style:style>
    <style:style style:name="Table1.A1" style:family="table-cell">
      <style:table-cell-properties style:vertical-align="middle" fo:background-color="#0a0d12" fo:padding-left="0.741cm" fo:padding-right="0.741cm" fo:padding-top="1.588cm" fo:padding-bottom="1.341cm" fo:border="none">
        <style:background-image/>
      </style:table-cell-properties>
    </style:style>
    <style:style style:name="Table1.A2" style:family="table-cell">
      <style:table-cell-properties fo:background-color="#f59e0b" fo:padding-left="0cm" fo:padding-right="0cm" fo:padding-top="0.123cm" fo:padding-bottom="0.123cm" fo:border="none">
        <style:background-image/>
      </style:table-cell-properties>
    </style:style>
    <style:style style:name="Table1.B2" style:family="table-cell">
      <style:table-cell-properties fo:background-color="#00d4a8" fo:padding-left="0cm" fo:padding-right="0cm" fo:padding-top="0.123cm" fo:padding-bottom="0.123cm" fo:border="none">
        <style:background-image/>
      </style:table-cell-properties>
    </style:style>
    <style:style style:name="Table1.C2" style:family="table-cell">
      <style:table-cell-properties fo:background-color="#ff4d6a" fo:padding-left="0cm" fo:padding-right="0cm" fo:padding-top="0.123cm" fo:padding-bottom="0.123cm" fo:border="none">
        <style:background-image/>
      </style:table-cell-properties>
    </style:style>
    <style:style style:name="Table1.D2" style:family="table-cell">
      <style:table-cell-properties fo:background-color="#00d4ff" fo:padding-left="0cm" fo:padding-right="0cm" fo:padding-top="0.123cm" fo:padding-bottom="0.123cm" fo:border="none">
        <style:background-image/>
      </style:table-cell-properties>
    </style:style>
    <style:style style:name="Table1.E2" style:family="table-cell">
      <style:table-cell-properties fo:background-color="#3b82f6" fo:padding-left="0cm" fo:padding-right="0cm" fo:padding-top="0.123cm" fo:padding-bottom="0.123cm" fo:border="none">
        <style:background-image/>
      </style:table-cell-properties>
    </style:style>
    <style:style style:name="Table2" style:family="table">
      <style:table-properties style:width="18.136cm" style:rel-width="100%" fo:margin-top="0cm" fo:margin-bottom="0cm" table:align="center" style:writing-mode="page"/>
    </style:style>
    <style:style style:name="Table2.A" style:family="table-column">
      <style:table-column-properties style:column-width="9.068cm" style:rel-column-width="32767*"/>
    </style:style>
    <style:style style:name="Table2.1" style:family="table-row">
      <style:table-row-properties style:min-row-height="0.635cm" fo:keep-together="auto"/>
    </style:style>
    <style:style style:name="Table2.A1" style:family="table-cell">
      <style:table-cell-properties fo:background-color="#f5f7fa" fo:padding-left="0.194cm" fo:padding-right="0.194cm" fo:padding-top="0.159cm" fo:padding-bottom="0.159cm" fo:border="0.75pt solid #d9e1ea">
        <style:background-image/>
      </style:table-cell-properties>
    </style:style>
    <style:style style:name="Table3" style:family="table">
      <style:table-properties style:width="18.136cm" style:rel-width="100%" fo:margin-left="-0.191cm" fo:margin-top="0cm" fo:margin-bottom="0cm" table:align="left" style:writing-mode="page"/>
    </style:style>
    <style:style style:name="Table3.A" style:family="table-column">
      <style:table-column-properties style:column-width="4.535cm" style:rel-column-width="16383*"/>
    </style:style>
    <style:style style:name="Table3.B" style:family="table-column">
      <style:table-column-properties style:column-width="4.535cm" style:rel-column-width="16384*"/>
    </style:style>
    <style:style style:name="Table3.D" style:family="table-column">
      <style:table-column-properties style:column-width="4.533cm" style:rel-column-width="16381*"/>
    </style:style>
    <style:style style:name="Table3.1" style:family="table-row">
      <style:table-row-properties fo:keep-together="auto"/>
    </style:style>
    <style:style style:name="Table3.A1" style:family="table-cell">
      <style:table-cell-properties fo:background-color="#0f1318" fo:padding="0.141cm" fo:border="0.75pt solid #1a2030">
        <style:background-image/>
      </style:table-cell-properties>
    </style:style>
    <style:style style:name="Table3.A2" style:family="table-cell">
      <style:table-cell-properties fo:padding-left="0.132cm" fo:padding-right="0.132cm" fo:padding-top="0.115cm" fo:padding-bottom="0.115cm" fo:border="0.75pt solid #d9e1ea"/>
    </style:style>
    <style:style style:name="Table3.B2" style:family="table-cell">
      <style:table-cell-properties fo:padding-left="0.132cm" fo:padding-right="0.132cm" fo:padding-top="0.115cm" fo:padding-bottom="0.115cm" fo:border="0.75pt solid #d9e1ea"/>
    </style:style>
    <style:style style:name="Table3.C2" style:family="table-cell">
      <style:table-cell-properties fo:background-color="#050709" fo:padding-left="0.132cm" fo:padding-right="0.132cm" fo:padding-top="0.115cm" fo:padding-bottom="0.115cm" fo:border="0.75pt solid #d9e1ea">
        <style:background-image/>
      </style:table-cell-properties>
    </style:style>
    <style:style style:name="Table3.D2" style:family="table-cell">
      <style:table-cell-properties fo:padding-left="0.132cm" fo:padding-right="0.132cm" fo:padding-top="0.115cm" fo:padding-bottom="0.115cm" fo:border="0.75pt solid #d9e1ea"/>
    </style:style>
    <style:style style:name="Table3.A3" style:family="table-cell">
      <style:table-cell-properties fo:padding-left="0.132cm" fo:padding-right="0.132cm" fo:padding-top="0.115cm" fo:padding-bottom="0.115cm" fo:border="0.75pt solid #d9e1ea"/>
    </style:style>
    <style:style style:name="Table3.B3" style:family="table-cell">
      <style:table-cell-properties fo:padding-left="0.132cm" fo:padding-right="0.132cm" fo:padding-top="0.115cm" fo:padding-bottom="0.115cm" fo:border="0.75pt solid #d9e1ea"/>
    </style:style>
    <style:style style:name="Table3.C3" style:family="table-cell">
      <style:table-cell-properties fo:background-color="#0a0d12" fo:padding-left="0.132cm" fo:padding-right="0.132cm" fo:padding-top="0.115cm" fo:padding-bottom="0.115cm" fo:border="0.75pt solid #d9e1ea">
        <style:background-image/>
      </style:table-cell-properties>
    </style:style>
    <style:style style:name="Table3.D3" style:family="table-cell">
      <style:table-cell-properties fo:padding-left="0.132cm" fo:padding-right="0.132cm" fo:padding-top="0.115cm" fo:padding-bottom="0.115cm" fo:border="0.75pt solid #d9e1ea"/>
    </style:style>
    <style:style style:name="Table3.A4" style:family="table-cell">
      <style:table-cell-properties fo:padding-left="0.132cm" fo:padding-right="0.132cm" fo:padding-top="0.115cm" fo:padding-bottom="0.115cm" fo:border="0.75pt solid #d9e1ea"/>
    </style:style>
    <style:style style:name="Table3.B4" style:family="table-cell">
      <style:table-cell-properties fo:padding-left="0.132cm" fo:padding-right="0.132cm" fo:padding-top="0.115cm" fo:padding-bottom="0.115cm" fo:border="0.75pt solid #d9e1ea"/>
    </style:style>
    <style:style style:name="Table3.C4" style:family="table-cell">
      <style:table-cell-properties fo:background-color="#0f1318" fo:padding-left="0.132cm" fo:padding-right="0.132cm" fo:padding-top="0.115cm" fo:padding-bottom="0.115cm" fo:border="0.75pt solid #d9e1ea">
        <style:background-image/>
      </style:table-cell-properties>
    </style:style>
    <style:style style:name="Table3.D4" style:family="table-cell">
      <style:table-cell-properties fo:padding-left="0.132cm" fo:padding-right="0.132cm" fo:padding-top="0.115cm" fo:padding-bottom="0.115cm" fo:border="0.75pt solid #d9e1ea"/>
    </style:style>
    <style:style style:name="Table3.A5" style:family="table-cell">
      <style:table-cell-properties fo:padding-left="0.132cm" fo:padding-right="0.132cm" fo:padding-top="0.115cm" fo:padding-bottom="0.115cm" fo:border="0.75pt solid #d9e1ea"/>
    </style:style>
    <style:style style:name="Table3.B5" style:family="table-cell">
      <style:table-cell-properties fo:padding-left="0.132cm" fo:padding-right="0.132cm" fo:padding-top="0.115cm" fo:padding-bottom="0.115cm" fo:border="0.75pt solid #d9e1ea"/>
    </style:style>
    <style:style style:name="Table3.C5" style:family="table-cell">
      <style:table-cell-properties fo:background-color="#141920" fo:padding-left="0.132cm" fo:padding-right="0.132cm" fo:padding-top="0.115cm" fo:padding-bottom="0.115cm" fo:border="0.75pt solid #d9e1ea">
        <style:background-image/>
      </style:table-cell-properties>
    </style:style>
    <style:style style:name="Table3.D5" style:family="table-cell">
      <style:table-cell-properties fo:padding-left="0.132cm" fo:padding-right="0.132cm" fo:padding-top="0.115cm" fo:padding-bottom="0.115cm" fo:border="0.75pt solid #d9e1ea"/>
    </style:style>
    <style:style style:name="Table3.A6" style:family="table-cell">
      <style:table-cell-properties fo:padding-left="0.132cm" fo:padding-right="0.132cm" fo:padding-top="0.115cm" fo:padding-bottom="0.115cm" fo:border="0.75pt solid #d9e1ea"/>
    </style:style>
    <style:style style:name="Table3.B6" style:family="table-cell">
      <style:table-cell-properties fo:padding-left="0.132cm" fo:padding-right="0.132cm" fo:padding-top="0.115cm" fo:padding-bottom="0.115cm" fo:border="0.75pt solid #d9e1ea"/>
    </style:style>
    <style:style style:name="Table3.C6" style:family="table-cell">
      <style:table-cell-properties fo:background-color="#1a2030" fo:padding-left="0.132cm" fo:padding-right="0.132cm" fo:padding-top="0.115cm" fo:padding-bottom="0.115cm" fo:border="0.75pt solid #d9e1ea">
        <style:background-image/>
      </style:table-cell-properties>
    </style:style>
    <style:style style:name="Table3.D6" style:family="table-cell">
      <style:table-cell-properties fo:padding-left="0.132cm" fo:padding-right="0.132cm" fo:padding-top="0.115cm" fo:padding-bottom="0.115cm" fo:border="0.75pt solid #d9e1ea"/>
    </style:style>
    <style:style style:name="Table3.A7" style:family="table-cell">
      <style:table-cell-properties fo:padding-left="0.132cm" fo:padding-right="0.132cm" fo:padding-top="0.115cm" fo:padding-bottom="0.115cm" fo:border="0.75pt solid #d9e1ea"/>
    </style:style>
    <style:style style:name="Table3.B7" style:family="table-cell">
      <style:table-cell-properties fo:padding-left="0.132cm" fo:padding-right="0.132cm" fo:padding-top="0.115cm" fo:padding-bottom="0.115cm" fo:border="0.75pt solid #d9e1ea"/>
    </style:style>
    <style:style style:name="Table3.C7" style:family="table-cell">
      <style:table-cell-properties fo:background-color="#070a0f" fo:padding-left="0.132cm" fo:padding-right="0.132cm" fo:padding-top="0.115cm" fo:padding-bottom="0.115cm" fo:border="0.75pt solid #d9e1ea">
        <style:background-image/>
      </style:table-cell-properties>
    </style:style>
    <style:style style:name="Table3.D7" style:family="table-cell">
      <style:table-cell-properties fo:padding-left="0.132cm" fo:padding-right="0.132cm" fo:padding-top="0.115cm" fo:padding-bottom="0.115cm" fo:border="0.75pt solid #d9e1ea"/>
    </style:style>
    <style:style style:name="Table3.A8" style:family="table-cell">
      <style:table-cell-properties fo:padding-left="0.132cm" fo:padding-right="0.132cm" fo:padding-top="0.115cm" fo:padding-bottom="0.115cm" fo:border="0.75pt solid #d9e1ea"/>
    </style:style>
    <style:style style:name="Table3.B8" style:family="table-cell">
      <style:table-cell-properties fo:padding-left="0.132cm" fo:padding-right="0.132cm" fo:padding-top="0.115cm" fo:padding-bottom="0.115cm" fo:border="0.75pt solid #d9e1ea"/>
    </style:style>
    <style:style style:name="Table3.C8" style:family="table-cell">
      <style:table-cell-properties fo:background-color="#00d4a8" fo:padding-left="0.132cm" fo:padding-right="0.132cm" fo:padding-top="0.115cm" fo:padding-bottom="0.115cm" fo:border="0.75pt solid #d9e1ea">
        <style:background-image/>
      </style:table-cell-properties>
    </style:style>
    <style:style style:name="Table3.D8" style:family="table-cell">
      <style:table-cell-properties fo:padding-left="0.132cm" fo:padding-right="0.132cm" fo:padding-top="0.115cm" fo:padding-bottom="0.115cm" fo:border="0.75pt solid #d9e1ea"/>
    </style:style>
    <style:style style:name="Table3.A9" style:family="table-cell">
      <style:table-cell-properties fo:padding-left="0.132cm" fo:padding-right="0.132cm" fo:padding-top="0.115cm" fo:padding-bottom="0.115cm" fo:border="0.75pt solid #d9e1ea"/>
    </style:style>
    <style:style style:name="Table3.B9" style:family="table-cell">
      <style:table-cell-properties fo:padding-left="0.132cm" fo:padding-right="0.132cm" fo:padding-top="0.115cm" fo:padding-bottom="0.115cm" fo:border="0.75pt solid #d9e1ea"/>
    </style:style>
    <style:style style:name="Table3.C9" style:family="table-cell">
      <style:table-cell-properties fo:background-color="#ff4d6a" fo:padding-left="0.132cm" fo:padding-right="0.132cm" fo:padding-top="0.115cm" fo:padding-bottom="0.115cm" fo:border="0.75pt solid #d9e1ea">
        <style:background-image/>
      </style:table-cell-properties>
    </style:style>
    <style:style style:name="Table3.D9" style:family="table-cell">
      <style:table-cell-properties fo:padding-left="0.132cm" fo:padding-right="0.132cm" fo:padding-top="0.115cm" fo:padding-bottom="0.115cm" fo:border="0.75pt solid #d9e1ea"/>
    </style:style>
    <style:style style:name="Table3.A10" style:family="table-cell">
      <style:table-cell-properties fo:padding-left="0.132cm" fo:padding-right="0.132cm" fo:padding-top="0.115cm" fo:padding-bottom="0.115cm" fo:border="0.75pt solid #d9e1ea"/>
    </style:style>
    <style:style style:name="Table3.B10" style:family="table-cell">
      <style:table-cell-properties fo:padding-left="0.132cm" fo:padding-right="0.132cm" fo:padding-top="0.115cm" fo:padding-bottom="0.115cm" fo:border="0.75pt solid #d9e1ea"/>
    </style:style>
    <style:style style:name="Table3.C10" style:family="table-cell">
      <style:table-cell-properties fo:background-color="#f59e0b" fo:padding-left="0.132cm" fo:padding-right="0.132cm" fo:padding-top="0.115cm" fo:padding-bottom="0.115cm" fo:border="0.75pt solid #d9e1ea">
        <style:background-image/>
      </style:table-cell-properties>
    </style:style>
    <style:style style:name="Table3.D10" style:family="table-cell">
      <style:table-cell-properties fo:padding-left="0.132cm" fo:padding-right="0.132cm" fo:padding-top="0.115cm" fo:padding-bottom="0.115cm" fo:border="0.75pt solid #d9e1ea"/>
    </style:style>
    <style:style style:name="Table3.A11" style:family="table-cell">
      <style:table-cell-properties fo:padding-left="0.132cm" fo:padding-right="0.132cm" fo:padding-top="0.115cm" fo:padding-bottom="0.115cm" fo:border="0.75pt solid #d9e1ea"/>
    </style:style>
    <style:style style:name="Table3.B11" style:family="table-cell">
      <style:table-cell-properties fo:padding-left="0.132cm" fo:padding-right="0.132cm" fo:padding-top="0.115cm" fo:padding-bottom="0.115cm" fo:border="0.75pt solid #d9e1ea"/>
    </style:style>
    <style:style style:name="Table3.C11" style:family="table-cell">
      <style:table-cell-properties fo:background-color="#00d4ff" fo:padding-left="0.132cm" fo:padding-right="0.132cm" fo:padding-top="0.115cm" fo:padding-bottom="0.115cm" fo:border="0.75pt solid #d9e1ea">
        <style:background-image/>
      </style:table-cell-properties>
    </style:style>
    <style:style style:name="Table3.D11" style:family="table-cell">
      <style:table-cell-properties fo:padding-left="0.132cm" fo:padding-right="0.132cm" fo:padding-top="0.115cm" fo:padding-bottom="0.115cm" fo:border="0.75pt solid #d9e1ea"/>
    </style:style>
    <style:style style:name="Table3.A12" style:family="table-cell">
      <style:table-cell-properties fo:padding-left="0.132cm" fo:padding-right="0.132cm" fo:padding-top="0.115cm" fo:padding-bottom="0.115cm" fo:border="0.75pt solid #d9e1ea"/>
    </style:style>
    <style:style style:name="Table3.B12" style:family="table-cell">
      <style:table-cell-properties fo:padding-left="0.132cm" fo:padding-right="0.132cm" fo:padding-top="0.115cm" fo:padding-bottom="0.115cm" fo:border="0.75pt solid #d9e1ea"/>
    </style:style>
    <style:style style:name="Table3.C12" style:family="table-cell">
      <style:table-cell-properties fo:background-color="#e8f0ff" fo:padding-left="0.132cm" fo:padding-right="0.132cm" fo:padding-top="0.115cm" fo:padding-bottom="0.115cm" fo:border="0.75pt solid #d9e1ea">
        <style:background-image/>
      </style:table-cell-properties>
    </style:style>
    <style:style style:name="Table3.D12" style:family="table-cell">
      <style:table-cell-properties fo:padding-left="0.132cm" fo:padding-right="0.132cm" fo:padding-top="0.115cm" fo:padding-bottom="0.115cm" fo:border="0.75pt solid #d9e1ea"/>
    </style:style>
    <style:style style:name="Table3.A13" style:family="table-cell">
      <style:table-cell-properties fo:padding-left="0.132cm" fo:padding-right="0.132cm" fo:padding-top="0.115cm" fo:padding-bottom="0.115cm" fo:border="0.75pt solid #d9e1ea"/>
    </style:style>
    <style:style style:name="Table3.B13" style:family="table-cell">
      <style:table-cell-properties fo:padding-left="0.132cm" fo:padding-right="0.132cm" fo:padding-top="0.115cm" fo:padding-bottom="0.115cm" fo:border="0.75pt solid #d9e1ea"/>
    </style:style>
    <style:style style:name="Table3.C13" style:family="table-cell">
      <style:table-cell-properties fo:background-color="#a8bcd4" fo:padding-left="0.132cm" fo:padding-right="0.132cm" fo:padding-top="0.115cm" fo:padding-bottom="0.115cm" fo:border="0.75pt solid #d9e1ea">
        <style:background-image/>
      </style:table-cell-properties>
    </style:style>
    <style:style style:name="Table3.D13" style:family="table-cell">
      <style:table-cell-properties fo:padding-left="0.132cm" fo:padding-right="0.132cm" fo:padding-top="0.115cm" fo:padding-bottom="0.115cm" fo:border="0.75pt solid #d9e1ea"/>
    </style:style>
    <style:style style:name="Table3.A14" style:family="table-cell">
      <style:table-cell-properties fo:padding-left="0.132cm" fo:padding-right="0.132cm" fo:padding-top="0.115cm" fo:padding-bottom="0.115cm" fo:border="0.75pt solid #d9e1ea"/>
    </style:style>
    <style:style style:name="Table3.B14" style:family="table-cell">
      <style:table-cell-properties fo:padding-left="0.132cm" fo:padding-right="0.132cm" fo:padding-top="0.115cm" fo:padding-bottom="0.115cm" fo:border="0.75pt solid #d9e1ea"/>
    </style:style>
    <style:style style:name="Table3.C14" style:family="table-cell">
      <style:table-cell-properties fo:background-color="#5a7090" fo:padding-left="0.132cm" fo:padding-right="0.132cm" fo:padding-top="0.115cm" fo:padding-bottom="0.115cm" fo:border="0.75pt solid #d9e1ea">
        <style:background-image/>
      </style:table-cell-properties>
    </style:style>
    <style:style style:name="Table3.D14" style:family="table-cell">
      <style:table-cell-properties fo:padding-left="0.132cm" fo:padding-right="0.132cm" fo:padding-top="0.115cm" fo:padding-bottom="0.115cm" fo:border="0.75pt solid #d9e1ea"/>
    </style:style>
    <style:style style:name="Table3.A15" style:family="table-cell">
      <style:table-cell-properties fo:padding-left="0.132cm" fo:padding-right="0.132cm" fo:padding-top="0.115cm" fo:padding-bottom="0.115cm" fo:border="0.75pt solid #d9e1ea"/>
    </style:style>
    <style:style style:name="Table3.B15" style:family="table-cell">
      <style:table-cell-properties fo:padding-left="0.132cm" fo:padding-right="0.132cm" fo:padding-top="0.115cm" fo:padding-bottom="0.115cm" fo:border="0.75pt solid #d9e1ea"/>
    </style:style>
    <style:style style:name="Table3.C15" style:family="table-cell">
      <style:table-cell-properties fo:background-color="#2a3a50" fo:padding-left="0.132cm" fo:padding-right="0.132cm" fo:padding-top="0.115cm" fo:padding-bottom="0.115cm" fo:border="0.75pt solid #d9e1ea">
        <style:background-image/>
      </style:table-cell-properties>
    </style:style>
    <style:style style:name="Table3.D15" style:family="table-cell">
      <style:table-cell-properties fo:padding-left="0.132cm" fo:padding-right="0.132cm" fo:padding-top="0.115cm" fo:padding-bottom="0.115cm" fo:border="0.75pt solid #d9e1ea"/>
    </style:style>
    <style:style style:name="Table3.A16" style:family="table-cell">
      <style:table-cell-properties fo:padding-left="0.132cm" fo:padding-right="0.132cm" fo:padding-top="0.115cm" fo:padding-bottom="0.115cm" fo:border="0.75pt solid #d9e1ea"/>
    </style:style>
    <style:style style:name="Table3.B16" style:family="table-cell">
      <style:table-cell-properties fo:padding-left="0.132cm" fo:padding-right="0.132cm" fo:padding-top="0.115cm" fo:padding-bottom="0.115cm" fo:border="0.75pt solid #d9e1ea"/>
    </style:style>
    <style:style style:name="Table3.C16" style:family="table-cell">
      <style:table-cell-properties fo:background-color="#1a2840" fo:padding-left="0.132cm" fo:padding-right="0.132cm" fo:padding-top="0.115cm" fo:padding-bottom="0.115cm" fo:border="0.75pt solid #d9e1ea">
        <style:background-image/>
      </style:table-cell-properties>
    </style:style>
    <style:style style:name="Table3.D16" style:family="table-cell">
      <style:table-cell-properties fo:padding-left="0.132cm" fo:padding-right="0.132cm" fo:padding-top="0.115cm" fo:padding-bottom="0.115cm" fo:border="0.75pt solid #d9e1ea"/>
    </style:style>
    <style:style style:name="Table4" style:family="table">
      <style:table-properties style:width="18.136cm" style:rel-width="100%" fo:margin-left="-0.191cm" fo:margin-top="0cm" fo:margin-bottom="0cm" table:align="left" style:writing-mode="page"/>
    </style:style>
    <style:style style:name="Table4.A" style:family="table-column">
      <style:table-column-properties style:column-width="4.535cm" style:rel-column-width="16383*"/>
    </style:style>
    <style:style style:name="Table4.B" style:family="table-column">
      <style:table-column-properties style:column-width="4.535cm" style:rel-column-width="16384*"/>
    </style:style>
    <style:style style:name="Table4.D" style:family="table-column">
      <style:table-column-properties style:column-width="4.533cm" style:rel-column-width="16381*"/>
    </style:style>
    <style:style style:name="Table4.1" style:family="table-row">
      <style:table-row-properties fo:keep-together="auto"/>
    </style:style>
    <style:style style:name="Table4.A1" style:family="table-cell">
      <style:table-cell-properties fo:background-color="#0f1318" fo:padding="0.141cm" fo:border="0.75pt solid #1a2030">
        <style:background-image/>
      </style:table-cell-properties>
    </style:style>
    <style:style style:name="Table4.A2" style:family="table-cell">
      <style:table-cell-properties fo:padding-left="0.132cm" fo:padding-right="0.132cm" fo:padding-top="0.115cm" fo:padding-bottom="0.115cm" fo:border="0.75pt solid #d9e1ea"/>
    </style:style>
    <style:style style:name="Table4.B2" style:family="table-cell">
      <style:table-cell-properties fo:padding-left="0.132cm" fo:padding-right="0.132cm" fo:padding-top="0.115cm" fo:padding-bottom="0.115cm" fo:border="0.75pt solid #d9e1ea"/>
    </style:style>
    <style:style style:name="Table4.C2" style:family="table-cell">
      <style:table-cell-properties fo:padding-left="0.132cm" fo:padding-right="0.132cm" fo:padding-top="0.115cm" fo:padding-bottom="0.115cm" fo:border="0.75pt solid #d9e1ea"/>
    </style:style>
    <style:style style:name="Table4.D2" style:family="table-cell">
      <style:table-cell-properties fo:padding-left="0.132cm" fo:padding-right="0.132cm" fo:padding-top="0.115cm" fo:padding-bottom="0.115cm" fo:border="0.75pt solid #d9e1ea"/>
    </style:style>
    <style:style style:name="Table4.A3" style:family="table-cell">
      <style:table-cell-properties fo:padding-left="0.132cm" fo:padding-right="0.132cm" fo:padding-top="0.115cm" fo:padding-bottom="0.115cm" fo:border="0.75pt solid #d9e1ea"/>
    </style:style>
    <style:style style:name="Table4.B3" style:family="table-cell">
      <style:table-cell-properties fo:padding-left="0.132cm" fo:padding-right="0.132cm" fo:padding-top="0.115cm" fo:padding-bottom="0.115cm" fo:border="0.75pt solid #d9e1ea"/>
    </style:style>
    <style:style style:name="Table4.C3" style:family="table-cell">
      <style:table-cell-properties fo:padding-left="0.132cm" fo:padding-right="0.132cm" fo:padding-top="0.115cm" fo:padding-bottom="0.115cm" fo:border="0.75pt solid #d9e1ea"/>
    </style:style>
    <style:style style:name="Table4.D3" style:family="table-cell">
      <style:table-cell-properties fo:padding-left="0.132cm" fo:padding-right="0.132cm" fo:padding-top="0.115cm" fo:padding-bottom="0.115cm" fo:border="0.75pt solid #d9e1ea"/>
    </style:style>
    <style:style style:name="Table4.A4" style:family="table-cell">
      <style:table-cell-properties fo:padding-left="0.132cm" fo:padding-right="0.132cm" fo:padding-top="0.115cm" fo:padding-bottom="0.115cm" fo:border="0.75pt solid #d9e1ea"/>
    </style:style>
    <style:style style:name="Table4.B4" style:family="table-cell">
      <style:table-cell-properties fo:padding-left="0.132cm" fo:padding-right="0.132cm" fo:padding-top="0.115cm" fo:padding-bottom="0.115cm" fo:border="0.75pt solid #d9e1ea"/>
    </style:style>
    <style:style style:name="Table4.C4" style:family="table-cell">
      <style:table-cell-properties fo:padding-left="0.132cm" fo:padding-right="0.132cm" fo:padding-top="0.115cm" fo:padding-bottom="0.115cm" fo:border="0.75pt solid #d9e1ea"/>
    </style:style>
    <style:style style:name="Table4.D4" style:family="table-cell">
      <style:table-cell-properties fo:padding-left="0.132cm" fo:padding-right="0.132cm" fo:padding-top="0.115cm" fo:padding-bottom="0.115cm" fo:border="0.75pt solid #d9e1ea"/>
    </style:style>
    <style:style style:name="Table4.A5" style:family="table-cell">
      <style:table-cell-properties fo:padding-left="0.132cm" fo:padding-right="0.132cm" fo:padding-top="0.115cm" fo:padding-bottom="0.115cm" fo:border="0.75pt solid #d9e1ea"/>
    </style:style>
    <style:style style:name="Table4.B5" style:family="table-cell">
      <style:table-cell-properties fo:padding-left="0.132cm" fo:padding-right="0.132cm" fo:padding-top="0.115cm" fo:padding-bottom="0.115cm" fo:border="0.75pt solid #d9e1ea"/>
    </style:style>
    <style:style style:name="Table4.C5" style:family="table-cell">
      <style:table-cell-properties fo:padding-left="0.132cm" fo:padding-right="0.132cm" fo:padding-top="0.115cm" fo:padding-bottom="0.115cm" fo:border="0.75pt solid #d9e1ea"/>
    </style:style>
    <style:style style:name="Table4.D5" style:family="table-cell">
      <style:table-cell-properties fo:padding-left="0.132cm" fo:padding-right="0.132cm" fo:padding-top="0.115cm" fo:padding-bottom="0.115cm" fo:border="0.75pt solid #d9e1ea"/>
    </style:style>
    <style:style style:name="Table4.A6" style:family="table-cell">
      <style:table-cell-properties fo:padding-left="0.132cm" fo:padding-right="0.132cm" fo:padding-top="0.115cm" fo:padding-bottom="0.115cm" fo:border="0.75pt solid #d9e1ea"/>
    </style:style>
    <style:style style:name="Table4.B6" style:family="table-cell">
      <style:table-cell-properties fo:padding-left="0.132cm" fo:padding-right="0.132cm" fo:padding-top="0.115cm" fo:padding-bottom="0.115cm" fo:border="0.75pt solid #d9e1ea"/>
    </style:style>
    <style:style style:name="Table4.C6" style:family="table-cell">
      <style:table-cell-properties fo:padding-left="0.132cm" fo:padding-right="0.132cm" fo:padding-top="0.115cm" fo:padding-bottom="0.115cm" fo:border="0.75pt solid #d9e1ea"/>
    </style:style>
    <style:style style:name="Table4.D6" style:family="table-cell">
      <style:table-cell-properties fo:padding-left="0.132cm" fo:padding-right="0.132cm" fo:padding-top="0.115cm" fo:padding-bottom="0.115cm" fo:border="0.75pt solid #d9e1ea"/>
    </style:style>
    <style:style style:name="Table4.A7" style:family="table-cell">
      <style:table-cell-properties fo:padding-left="0.132cm" fo:padding-right="0.132cm" fo:padding-top="0.115cm" fo:padding-bottom="0.115cm" fo:border="0.75pt solid #d9e1ea"/>
    </style:style>
    <style:style style:name="Table4.B7" style:family="table-cell">
      <style:table-cell-properties fo:padding-left="0.132cm" fo:padding-right="0.132cm" fo:padding-top="0.115cm" fo:padding-bottom="0.115cm" fo:border="0.75pt solid #d9e1ea"/>
    </style:style>
    <style:style style:name="Table4.C7" style:family="table-cell">
      <style:table-cell-properties fo:padding-left="0.132cm" fo:padding-right="0.132cm" fo:padding-top="0.115cm" fo:padding-bottom="0.115cm" fo:border="0.75pt solid #d9e1ea"/>
    </style:style>
    <style:style style:name="Table4.D7" style:family="table-cell">
      <style:table-cell-properties fo:padding-left="0.132cm" fo:padding-right="0.132cm" fo:padding-top="0.115cm" fo:padding-bottom="0.115cm" fo:border="0.75pt solid #d9e1ea"/>
    </style:style>
    <style:style style:name="Table5" style:family="table">
      <style:table-properties style:width="18.136cm" style:rel-width="100%" fo:margin-left="-0.191cm" fo:margin-top="0cm" fo:margin-bottom="0cm" table:align="left" style:writing-mode="page"/>
    </style:style>
    <style:style style:name="Table5.A" style:family="table-column">
      <style:table-column-properties style:column-width="9.068cm" style:rel-column-width="32767*"/>
    </style:style>
    <style:style style:name="Table5.1" style:family="table-row">
      <style:table-row-properties fo:keep-together="auto"/>
    </style:style>
    <style:style style:name="Table5.A1" style:family="table-cell">
      <style:table-cell-properties fo:background-color="#0f1318" fo:padding="0.141cm" fo:border="0.75pt solid #1a2030">
        <style:background-image/>
      </style:table-cell-properties>
    </style:style>
    <style:style style:name="Table5.A2" style:family="table-cell">
      <style:table-cell-properties fo:padding-left="0.132cm" fo:padding-right="0.132cm" fo:padding-top="0.115cm" fo:padding-bottom="0.115cm" fo:border="0.75pt solid #d9e1ea"/>
    </style:style>
    <style:style style:name="Table5.B2" style:family="table-cell">
      <style:table-cell-properties fo:padding-left="0.132cm" fo:padding-right="0.132cm" fo:padding-top="0.115cm" fo:padding-bottom="0.115cm" fo:border="0.75pt solid #d9e1ea"/>
    </style:style>
    <style:style style:name="Table5.A3" style:family="table-cell">
      <style:table-cell-properties fo:padding-left="0.132cm" fo:padding-right="0.132cm" fo:padding-top="0.115cm" fo:padding-bottom="0.115cm" fo:border="0.75pt solid #d9e1ea"/>
    </style:style>
    <style:style style:name="Table5.B3" style:family="table-cell">
      <style:table-cell-properties fo:padding-left="0.132cm" fo:padding-right="0.132cm" fo:padding-top="0.115cm" fo:padding-bottom="0.115cm" fo:border="0.75pt solid #d9e1ea"/>
    </style:style>
    <style:style style:name="Table5.A4" style:family="table-cell">
      <style:table-cell-properties fo:padding-left="0.132cm" fo:padding-right="0.132cm" fo:padding-top="0.115cm" fo:padding-bottom="0.115cm" fo:border="0.75pt solid #d9e1ea"/>
    </style:style>
    <style:style style:name="Table5.B4" style:family="table-cell">
      <style:table-cell-properties fo:padding-left="0.132cm" fo:padding-right="0.132cm" fo:padding-top="0.115cm" fo:padding-bottom="0.115cm" fo:border="0.75pt solid #d9e1ea"/>
    </style:style>
    <style:style style:name="Table5.A5" style:family="table-cell">
      <style:table-cell-properties fo:padding-left="0.132cm" fo:padding-right="0.132cm" fo:padding-top="0.115cm" fo:padding-bottom="0.115cm" fo:border="0.75pt solid #d9e1ea"/>
    </style:style>
    <style:style style:name="Table5.B5" style:family="table-cell">
      <style:table-cell-properties fo:padding-left="0.132cm" fo:padding-right="0.132cm" fo:padding-top="0.115cm" fo:padding-bottom="0.115cm" fo:border="0.75pt solid #d9e1ea"/>
    </style:style>
    <style:style style:name="Table5.A6" style:family="table-cell">
      <style:table-cell-properties fo:padding-left="0.132cm" fo:padding-right="0.132cm" fo:padding-top="0.115cm" fo:padding-bottom="0.115cm" fo:border="0.75pt solid #d9e1ea"/>
    </style:style>
    <style:style style:name="Table5.B6" style:family="table-cell">
      <style:table-cell-properties fo:padding-left="0.132cm" fo:padding-right="0.132cm" fo:padding-top="0.115cm" fo:padding-bottom="0.115cm" fo:border="0.75pt solid #d9e1ea"/>
    </style:style>
    <style:style style:name="Table5.A7" style:family="table-cell">
      <style:table-cell-properties fo:padding-left="0.132cm" fo:padding-right="0.132cm" fo:padding-top="0.115cm" fo:padding-bottom="0.115cm" fo:border="0.75pt solid #d9e1ea"/>
    </style:style>
    <style:style style:name="Table5.B7" style:family="table-cell">
      <style:table-cell-properties fo:padding-left="0.132cm" fo:padding-right="0.132cm" fo:padding-top="0.115cm" fo:padding-bottom="0.115cm" fo:border="0.75pt solid #d9e1ea"/>
    </style:style>
    <style:style style:name="Table5.A8" style:family="table-cell">
      <style:table-cell-properties fo:padding-left="0.132cm" fo:padding-right="0.132cm" fo:padding-top="0.115cm" fo:padding-bottom="0.115cm" fo:border="0.75pt solid #d9e1ea"/>
    </style:style>
    <style:style style:name="Table5.B8" style:family="table-cell">
      <style:table-cell-properties fo:padding-left="0.132cm" fo:padding-right="0.132cm" fo:padding-top="0.115cm" fo:padding-bottom="0.115cm" fo:border="0.75pt solid #d9e1ea"/>
    </style:style>
    <style:style style:name="Table6" style:family="table">
      <style:table-properties style:width="18.136cm" style:rel-width="100%" fo:margin-left="-0.191cm" fo:margin-top="0cm" fo:margin-bottom="0cm" table:align="left" style:writing-mode="page"/>
    </style:style>
    <style:style style:name="Table6.A" style:family="table-column">
      <style:table-column-properties style:column-width="6.045cm" style:rel-column-width="21845*"/>
    </style:style>
    <style:style style:name="Table6.B" style:family="table-column">
      <style:table-column-properties style:column-width="6.047cm" style:rel-column-width="21847*"/>
    </style:style>
    <style:style style:name="Table6.C" style:family="table-column">
      <style:table-column-properties style:column-width="6.045cm" style:rel-column-width="21843*"/>
    </style:style>
    <style:style style:name="Table6.1" style:family="table-row">
      <style:table-row-properties fo:keep-together="auto"/>
    </style:style>
    <style:style style:name="Table6.A1" style:family="table-cell">
      <style:table-cell-properties fo:background-color="#0f1318" fo:padding="0.141cm" fo:border="0.75pt solid #1a2030">
        <style:background-image/>
      </style:table-cell-properties>
    </style:style>
    <style:style style:name="Table6.A2" style:family="table-cell">
      <style:table-cell-properties fo:padding-left="0.132cm" fo:padding-right="0.132cm" fo:padding-top="0.115cm" fo:padding-bottom="0.115cm" fo:border="0.75pt solid #d9e1ea"/>
    </style:style>
    <style:style style:name="Table6.B2" style:family="table-cell">
      <style:table-cell-properties fo:padding-left="0.132cm" fo:padding-right="0.132cm" fo:padding-top="0.115cm" fo:padding-bottom="0.115cm" fo:border="0.75pt solid #d9e1ea"/>
    </style:style>
    <style:style style:name="Table6.C2" style:family="table-cell">
      <style:table-cell-properties fo:padding-left="0.132cm" fo:padding-right="0.132cm" fo:padding-top="0.115cm" fo:padding-bottom="0.115cm" fo:border="0.75pt solid #d9e1ea"/>
    </style:style>
    <style:style style:name="Table6.A3" style:family="table-cell">
      <style:table-cell-properties fo:padding-left="0.132cm" fo:padding-right="0.132cm" fo:padding-top="0.115cm" fo:padding-bottom="0.115cm" fo:border="0.75pt solid #d9e1ea"/>
    </style:style>
    <style:style style:name="Table6.B3" style:family="table-cell">
      <style:table-cell-properties fo:padding-left="0.132cm" fo:padding-right="0.132cm" fo:padding-top="0.115cm" fo:padding-bottom="0.115cm" fo:border="0.75pt solid #d9e1ea"/>
    </style:style>
    <style:style style:name="Table6.C3" style:family="table-cell">
      <style:table-cell-properties fo:padding-left="0.132cm" fo:padding-right="0.132cm" fo:padding-top="0.115cm" fo:padding-bottom="0.115cm" fo:border="0.75pt solid #d9e1ea"/>
    </style:style>
    <style:style style:name="Table6.A4" style:family="table-cell">
      <style:table-cell-properties fo:padding-left="0.132cm" fo:padding-right="0.132cm" fo:padding-top="0.115cm" fo:padding-bottom="0.115cm" fo:border="0.75pt solid #d9e1ea"/>
    </style:style>
    <style:style style:name="Table6.B4" style:family="table-cell">
      <style:table-cell-properties fo:padding-left="0.132cm" fo:padding-right="0.132cm" fo:padding-top="0.115cm" fo:padding-bottom="0.115cm" fo:border="0.75pt solid #d9e1ea"/>
    </style:style>
    <style:style style:name="Table6.C4" style:family="table-cell">
      <style:table-cell-properties fo:padding-left="0.132cm" fo:padding-right="0.132cm" fo:padding-top="0.115cm" fo:padding-bottom="0.115cm" fo:border="0.75pt solid #d9e1ea"/>
    </style:style>
    <style:style style:name="Table6.A5" style:family="table-cell">
      <style:table-cell-properties fo:padding-left="0.132cm" fo:padding-right="0.132cm" fo:padding-top="0.115cm" fo:padding-bottom="0.115cm" fo:border="0.75pt solid #d9e1ea"/>
    </style:style>
    <style:style style:name="Table6.B5" style:family="table-cell">
      <style:table-cell-properties fo:padding-left="0.132cm" fo:padding-right="0.132cm" fo:padding-top="0.115cm" fo:padding-bottom="0.115cm" fo:border="0.75pt solid #d9e1ea"/>
    </style:style>
    <style:style style:name="Table6.C5" style:family="table-cell">
      <style:table-cell-properties fo:padding-left="0.132cm" fo:padding-right="0.132cm" fo:padding-top="0.115cm" fo:padding-bottom="0.115cm" fo:border="0.75pt solid #d9e1ea"/>
    </style:style>
    <style:style style:name="Table6.A6" style:family="table-cell">
      <style:table-cell-properties fo:padding-left="0.132cm" fo:padding-right="0.132cm" fo:padding-top="0.115cm" fo:padding-bottom="0.115cm" fo:border="0.75pt solid #d9e1ea"/>
    </style:style>
    <style:style style:name="Table6.B6" style:family="table-cell">
      <style:table-cell-properties fo:padding-left="0.132cm" fo:padding-right="0.132cm" fo:padding-top="0.115cm" fo:padding-bottom="0.115cm" fo:border="0.75pt solid #d9e1ea"/>
    </style:style>
    <style:style style:name="Table6.C6" style:family="table-cell">
      <style:table-cell-properties fo:padding-left="0.132cm" fo:padding-right="0.132cm" fo:padding-top="0.115cm" fo:padding-bottom="0.115cm" fo:border="0.75pt solid #d9e1ea"/>
    </style:style>
    <style:style style:name="Table6.A7" style:family="table-cell">
      <style:table-cell-properties fo:padding-left="0.132cm" fo:padding-right="0.132cm" fo:padding-top="0.115cm" fo:padding-bottom="0.115cm" fo:border="0.75pt solid #d9e1ea"/>
    </style:style>
    <style:style style:name="Table6.B7" style:family="table-cell">
      <style:table-cell-properties fo:padding-left="0.132cm" fo:padding-right="0.132cm" fo:padding-top="0.115cm" fo:padding-bottom="0.115cm" fo:border="0.75pt solid #d9e1ea"/>
    </style:style>
    <style:style style:name="Table6.C7" style:family="table-cell">
      <style:table-cell-properties fo:padding-left="0.132cm" fo:padding-right="0.132cm" fo:padding-top="0.115cm" fo:padding-bottom="0.115cm" fo:border="0.75pt solid #d9e1ea"/>
    </style:style>
    <style:style style:name="Table7" style:family="table">
      <style:table-properties style:width="18.136cm" style:rel-width="100%" fo:margin-left="-0.191cm" fo:margin-top="0cm" fo:margin-bottom="0cm" table:align="left" style:writing-mode="page"/>
    </style:style>
    <style:style style:name="Table7.A" style:family="table-column">
      <style:table-column-properties style:column-width="9.068cm" style:rel-column-width="32767*"/>
    </style:style>
    <style:style style:name="Table7.1" style:family="table-row">
      <style:table-row-properties fo:keep-together="auto"/>
    </style:style>
    <style:style style:name="Table7.A1" style:family="table-cell">
      <style:table-cell-properties fo:background-color="#0f1318" fo:padding="0.141cm" fo:border="0.75pt solid #1a2030">
        <style:background-image/>
      </style:table-cell-properties>
    </style:style>
    <style:style style:name="Table7.A2" style:family="table-cell">
      <style:table-cell-properties fo:padding-left="0.132cm" fo:padding-right="0.132cm" fo:padding-top="0.106cm" fo:padding-bottom="0.106cm" fo:border="0.75pt solid #d9e1ea"/>
    </style:style>
    <style:style style:name="Table7.B2" style:family="table-cell">
      <style:table-cell-properties fo:padding-left="0.132cm" fo:padding-right="0.132cm" fo:padding-top="0.106cm" fo:padding-bottom="0.106cm" fo:border="0.75pt solid #d9e1ea"/>
    </style:style>
    <style:style style:name="Table7.A3" style:family="table-cell">
      <style:table-cell-properties fo:padding-left="0.132cm" fo:padding-right="0.132cm" fo:padding-top="0.106cm" fo:padding-bottom="0.106cm" fo:border="0.75pt solid #d9e1ea"/>
    </style:style>
    <style:style style:name="Table7.B3" style:family="table-cell">
      <style:table-cell-properties fo:padding-left="0.132cm" fo:padding-right="0.132cm" fo:padding-top="0.106cm" fo:padding-bottom="0.106cm" fo:border="0.75pt solid #d9e1ea"/>
    </style:style>
    <style:style style:name="Table7.A4" style:family="table-cell">
      <style:table-cell-properties fo:padding-left="0.132cm" fo:padding-right="0.132cm" fo:padding-top="0.106cm" fo:padding-bottom="0.106cm" fo:border="0.75pt solid #d9e1ea"/>
    </style:style>
    <style:style style:name="Table7.B4" style:family="table-cell">
      <style:table-cell-properties fo:padding-left="0.132cm" fo:padding-right="0.132cm" fo:padding-top="0.106cm" fo:padding-bottom="0.106cm" fo:border="0.75pt solid #d9e1ea"/>
    </style:style>
    <style:style style:name="Table7.A5" style:family="table-cell">
      <style:table-cell-properties fo:padding-left="0.132cm" fo:padding-right="0.132cm" fo:padding-top="0.106cm" fo:padding-bottom="0.106cm" fo:border="0.75pt solid #d9e1ea"/>
    </style:style>
    <style:style style:name="Table7.B5" style:family="table-cell">
      <style:table-cell-properties fo:padding-left="0.132cm" fo:padding-right="0.132cm" fo:padding-top="0.106cm" fo:padding-bottom="0.106cm" fo:border="0.75pt solid #d9e1ea"/>
    </style:style>
    <style:style style:name="Table7.A6" style:family="table-cell">
      <style:table-cell-properties fo:padding-left="0.132cm" fo:padding-right="0.132cm" fo:padding-top="0.106cm" fo:padding-bottom="0.106cm" fo:border="0.75pt solid #d9e1ea"/>
    </style:style>
    <style:style style:name="Table7.B6" style:family="table-cell">
      <style:table-cell-properties fo:padding-left="0.132cm" fo:padding-right="0.132cm" fo:padding-top="0.106cm" fo:padding-bottom="0.106cm" fo:border="0.75pt solid #d9e1ea"/>
    </style:style>
    <style:style style:name="Table7.A7" style:family="table-cell">
      <style:table-cell-properties fo:padding-left="0.132cm" fo:padding-right="0.132cm" fo:padding-top="0.106cm" fo:padding-bottom="0.106cm" fo:border="0.75pt solid #d9e1ea"/>
    </style:style>
    <style:style style:name="Table7.B7" style:family="table-cell">
      <style:table-cell-properties fo:padding-left="0.132cm" fo:padding-right="0.132cm" fo:padding-top="0.106cm" fo:padding-bottom="0.106cm" fo:border="0.75pt solid #d9e1ea"/>
    </style:style>
    <style:style style:name="Table7.A8" style:family="table-cell">
      <style:table-cell-properties fo:padding-left="0.132cm" fo:padding-right="0.132cm" fo:padding-top="0.106cm" fo:padding-bottom="0.106cm" fo:border="0.75pt solid #d9e1ea"/>
    </style:style>
    <style:style style:name="Table7.B8" style:family="table-cell">
      <style:table-cell-properties fo:padding-left="0.132cm" fo:padding-right="0.132cm" fo:padding-top="0.106cm" fo:padding-bottom="0.106cm" fo:border="0.75pt solid #d9e1ea"/>
    </style:style>
    <style:style style:name="Table7.A9" style:family="table-cell">
      <style:table-cell-properties fo:padding-left="0.132cm" fo:padding-right="0.132cm" fo:padding-top="0.106cm" fo:padding-bottom="0.106cm" fo:border="0.75pt solid #d9e1ea"/>
    </style:style>
    <style:style style:name="Table7.B9" style:family="table-cell">
      <style:table-cell-properties fo:padding-left="0.132cm" fo:padding-right="0.132cm" fo:padding-top="0.106cm" fo:padding-bottom="0.106cm" fo:border="0.75pt solid #d9e1ea"/>
    </style:style>
    <style:style style:name="Table7.A10" style:family="table-cell">
      <style:table-cell-properties fo:padding-left="0.132cm" fo:padding-right="0.132cm" fo:padding-top="0.106cm" fo:padding-bottom="0.106cm" fo:border="0.75pt solid #d9e1ea"/>
    </style:style>
    <style:style style:name="Table7.B10" style:family="table-cell">
      <style:table-cell-properties fo:padding-left="0.132cm" fo:padding-right="0.132cm" fo:padding-top="0.106cm" fo:padding-bottom="0.106cm" fo:border="0.75pt solid #d9e1ea"/>
    </style:style>
    <style:style style:name="Table8" style:family="table">
      <style:table-properties style:width="18.136cm" style:rel-width="100%" fo:margin-left="-0.191cm" fo:margin-top="0cm" fo:margin-bottom="0cm" table:align="left" style:writing-mode="page"/>
    </style:style>
    <style:style style:name="Table8.A" style:family="table-column">
      <style:table-column-properties style:column-width="9.068cm" style:rel-column-width="32767*"/>
    </style:style>
    <style:style style:name="Table8.1" style:family="table-row">
      <style:table-row-properties fo:keep-together="auto"/>
    </style:style>
    <style:style style:name="Table8.A1" style:family="table-cell">
      <style:table-cell-properties fo:background-color="#ecfdf5" fo:padding-left="0.176cm" fo:padding-right="0.176cm" fo:padding-top="0.159cm" fo:padding-bottom="0.159cm" fo:border="0.75pt solid #bbf7d0">
        <style:background-image/>
      </style:table-cell-properties>
    </style:style>
    <style:style style:name="Table8.B1" style:family="table-cell">
      <style:table-cell-properties fo:background-color="#fff1f2" fo:padding-left="0.176cm" fo:padding-right="0.176cm" fo:padding-top="0.159cm" fo:padding-bottom="0.159cm" fo:border="0.75pt solid #fecdd3">
        <style:background-image/>
      </style:table-cell-properties>
    </style:style>
    <style:style style:name="P1" style:family="paragraph" style:parent-style-name="Header">
      <style:paragraph-properties fo:text-align="end" style:justify-single-word="false"/>
      <style:text-properties fo:color="#5a7090" loext:opacity="100%" style:font-name="Consolas" fo:font-size="7.5pt" fo:font-weight="bold" style:font-name-asian="Consolas1" style:font-size-asian="7.5pt" style:font-weight-asian="bold"/>
    </style:style>
    <style:style style:name="P2" style:family="paragraph" style:parent-style-name="Footer">
      <style:paragraph-properties fo:text-align="center" style:justify-single-word="false"/>
      <style:text-properties fo:color="#6b7280" loext:opacity="100%" style:font-name="Aptos" fo:font-size="7.5pt" fo:font-weight="normal" style:font-name-asian="Aptos1" style:font-size-asian="7.5pt" style:font-weight-asian="normal"/>
    </style:style>
    <style:style style:name="P3" style:family="paragraph" style:parent-style-name="Callout">
      <loext:graphic-properties draw:fill="solid" draw:fill-color="#fff7ed"/>
      <style:paragraph-properties fo:background-color="#fff7ed"/>
    </style:style>
    <style:style style:name="P4" style:family="paragraph" style:parent-style-name="Callout">
      <loext:graphic-properties draw:fill="solid" draw:fill-color="#eff6ff"/>
      <style:paragraph-properties fo:background-color="#eff6ff"/>
    </style:style>
    <style:style style:name="P5" style:family="paragraph" style:parent-style-name="Heading_20_1">
      <style:paragraph-properties fo:margin-top="0cm" fo:margin-bottom="0.141cm" style:contextual-spacing="false" fo:break-before="page" fo:padding-left="0cm" fo:padding-right="0cm" fo:padding-top="0cm" fo:padding-bottom="0.035cm" fo:border-left="none" fo:border-right="none" fo:border-top="none" fo:border-bottom="1.5pt solid #f59e0b"/>
    </style:style>
    <style:style style:name="P6" style:family="paragraph" style:parent-style-name="Heading_20_1">
      <style:paragraph-properties fo:padding-left="0cm" fo:padding-right="0cm" fo:padding-top="0cm" fo:padding-bottom="0.035cm" fo:border-left="none" fo:border-right="none" fo:border-top="none" fo:border-bottom="1.5pt solid #f59e0b"/>
    </style:style>
    <style:style style:name="P7" style:family="paragraph" style:parent-style-name="Standard">
      <style:paragraph-properties fo:margin-top="0.071cm" fo:margin-bottom="0.071cm" style:contextual-spacing="false"/>
    </style:style>
    <style:style style:name="P8" style:family="paragraph" style:parent-style-name="Terminal_20_Code">
      <loext:graphic-properties draw:fill="solid" draw:fill-color="#0a0d12"/>
      <style:paragraph-properties fo:background-color="#0a0d12"/>
    </style:style>
    <style:style style:name="P9" style:family="paragraph" style:parent-style-name="Terminal_20_Code">
      <loext:graphic-properties draw:fill="solid" draw:fill-color="#0a0d12"/>
      <style:paragraph-properties fo:background-color="#0a0d12"/>
      <style:text-properties officeooo:paragraph-rsid="001e3346"/>
    </style:style>
    <style:style style:name="P10" style:family="paragraph" style:parent-style-name="Terminal_20_Code">
      <loext:graphic-properties draw:fill="solid" draw:fill-color="#0a0d12"/>
      <style:paragraph-properties fo:background-color="#0a0d12"/>
      <style:text-properties style:font-name="Consolas" style:font-name-asian="Consolas1"/>
    </style:style>
    <style:style style:name="P11" style:family="paragraph" style:parent-style-name="Standard">
      <style:text-properties style:font-name="Consolas" fo:font-size="8pt" fo:font-weight="bold" style:font-name-asian="Consolas1" style:font-size-asian="8pt" style:font-weight-asian="bold"/>
    </style:style>
    <style:style style:name="P12" style:family="paragraph" style:parent-style-name="Standard">
      <style:paragraph-properties fo:text-align="start" style:justify-single-word="false"/>
      <style:text-properties fo:color="#f59e0b" loext:opacity="100%" style:font-name="Consolas" fo:font-size="9pt" fo:font-weight="bold" style:font-name-asian="Consolas1" style:font-size-asian="9pt" style:font-weight-asian="bold"/>
    </style:style>
    <style:style style:name="P13" style:family="paragraph" style:parent-style-name="Standard">
      <style:text-properties fo:color="#f59e0b" loext:opacity="100%" fo:font-size="8.5pt" fo:font-weight="bold" style:font-size-asian="8.5pt" style:font-weight-asian="bold"/>
    </style:style>
    <style:style style:name="P14" style:family="paragraph" style:parent-style-name="Standard">
      <style:paragraph-properties fo:margin-top="0.423cm" fo:margin-bottom="0.141cm" style:contextual-spacing="false"/>
      <style:text-properties fo:color="#e8f0ff" loext:opacity="100%" style:font-name="Aptos Display" fo:font-size="28pt" fo:font-weight="bold" style:font-name-asian="Aptos Display1" style:font-size-asian="28pt" style:font-weight-asian="bold"/>
    </style:style>
    <style:style style:name="P15" style:family="paragraph" style:parent-style-name="Standard">
      <style:paragraph-properties fo:margin-top="0.282cm" fo:margin-bottom="0.141cm" style:contextual-spacing="false"/>
      <style:text-properties fo:color="#a8bcd4" loext:opacity="100%" style:font-name="Aptos" fo:font-size="11pt" fo:font-weight="normal" style:font-name-asian="Aptos1" style:font-size-asian="11pt" style:font-weight-asian="normal"/>
    </style:style>
    <style:style style:name="P16" style:family="paragraph" style:parent-style-name="Standard">
      <style:text-properties fo:color="#a8bcd4" loext:opacity="100%" style:font-name="Consolas" fo:font-size="8pt" fo:font-weight="bold" style:font-name-asian="Consolas1" style:font-size-asian="8pt" style:font-weight-asian="bold"/>
    </style:style>
    <style:style style:name="P17" style:family="paragraph" style:parent-style-name="Standard">
      <style:paragraph-properties fo:margin-top="0.706cm" fo:margin-bottom="0.141cm" style:contextual-spacing="false"/>
      <style:text-properties fo:color="#00d4ff" loext:opacity="100%" style:font-name="Consolas" fo:font-size="9.5pt" fo:font-weight="bold" style:font-name-asian="Consolas1" style:font-size-asian="9.5pt" style:font-weight-asian="bold"/>
    </style:style>
    <style:style style:name="P18" style:family="paragraph" style:parent-style-name="Standard">
      <style:text-properties fo:color="#00d4ff" loext:opacity="100%" fo:font-size="8.5pt" fo:font-weight="bold" style:font-size-asian="8.5pt" style:font-weight-asian="bold"/>
    </style:style>
    <style:style style:name="P19" style:family="paragraph" style:parent-style-name="Standard">
      <style:text-properties fo:color="#111827" loext:opacity="100%" style:font-name="Aptos" fo:font-size="10pt" fo:font-weight="bold" style:font-name-asian="Aptos1" style:font-size-asian="10pt" style:font-weight-asian="bold"/>
    </style:style>
    <style:style style:name="P20" style:family="paragraph" style:parent-style-name="Standard">
      <style:text-properties fo:color="#4b5563" loext:opacity="100%" style:font-name="Consolas" fo:font-size="8pt" style:font-name-asian="Consolas1" style:font-size-asian="8pt"/>
    </style:style>
    <style:style style:name="P21" style:family="paragraph" style:parent-style-name="Standard">
      <style:text-properties fo:color="#4b5563" loext:opacity="100%" style:font-name="Consolas" fo:font-size="8.5pt" style:font-name-asian="Consolas1" style:font-size-asian="8.5pt"/>
    </style:style>
    <style:style style:name="P22" style:family="paragraph" style:parent-style-name="Standard">
      <style:text-properties fo:color="#4b5563" loext:opacity="100%" fo:font-size="8.5pt" fo:font-weight="bold" style:font-size-asian="8.5pt" style:font-weight-asian="bold"/>
    </style:style>
    <style:style style:name="P23" style:family="paragraph" style:parent-style-name="Standard">
      <style:text-properties fo:font-size="8.5pt" style:font-size-asian="8.5pt"/>
    </style:style>
    <style:style style:name="P24" style:family="paragraph" style:parent-style-name="Standard">
      <style:text-properties fo:color="#00d4a8" loext:opacity="100%" fo:font-size="8.5pt" fo:font-weight="bold" style:font-size-asian="8.5pt" style:font-weight-asian="bold"/>
    </style:style>
    <style:style style:name="P25" style:family="paragraph" style:parent-style-name="Standard">
      <style:text-properties fo:color="#ff4d6a" loext:opacity="100%" fo:font-size="8.5pt" fo:font-weight="bold" style:font-size-asian="8.5pt" style:font-weight-asian="bold"/>
    </style:style>
    <style:style style:name="P26" style:family="paragraph" style:parent-style-name="Standard">
      <style:text-properties fo:color="#374151" loext:opacity="100%" fo:font-size="8.5pt" fo:font-weight="bold" style:font-size-asian="8.5pt" style:font-weight-asian="bold"/>
    </style:style>
    <style:style style:name="P27" style:family="paragraph" style:parent-style-name="Standard">
      <style:text-properties fo:color="#065f46" loext:opacity="100%" style:font-name="Aptos" fo:font-size="10.5pt" fo:font-weight="bold" style:font-name-asian="Aptos1" style:font-size-asian="10.5pt" style:font-weight-asian="bold"/>
    </style:style>
    <style:style style:name="P28" style:family="paragraph" style:parent-style-name="Standard">
      <style:text-properties fo:color="#991b1b" loext:opacity="100%" style:font-name="Aptos" fo:font-size="10.5pt" fo:font-weight="bold" style:font-name-asian="Aptos1" style:font-size-asian="10.5pt" style:font-weight-asian="bold"/>
    </style:style>
    <style:style style:name="P29" style:family="paragraph" style:parent-style-name="Rule_20_Body">
      <style:text-properties officeooo:paragraph-rsid="0020a14a"/>
    </style:style>
    <style:style style:name="T1" style:family="text">
      <style:text-properties fo:color="#f59e0b" loext:opacity="100%" style:font-name="Aptos" fo:font-weight="bold" style:font-name-asian="Aptos1" style:font-weight-asian="bold"/>
    </style:style>
    <style:style style:name="T2" style:family="text">
      <style:text-properties style:font-name="Aptos" fo:font-weight="bold" style:font-name-asian="Aptos1" style:font-weight-asian="bold"/>
    </style:style>
    <style:style style:name="T3" style:family="text">
      <style:text-properties fo:color="#111827" loext:opacity="100%" style:font-name="Aptos" fo:font-size="9pt" fo:font-weight="bold" style:font-name-asian="Aptos1" style:font-size-asian="9pt" style:font-weight-asian="bold"/>
    </style:style>
    <style:style style:name="T4" style:family="text">
      <style:text-properties fo:color="#111827" loext:opacity="100%" style:font-name="Aptos" fo:font-size="9pt" fo:font-weight="normal" style:font-name-asian="Aptos1" style:font-size-asian="9pt" style:font-weight-asian="normal"/>
    </style:style>
    <style:style style:name="T5" style:family="text">
      <style:text-properties fo:color="#9a3412" loext:opacity="100%" style:font-name="Aptos" fo:font-weight="bold" style:font-name-asian="Aptos1"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row table:style-name="Table1.1">
          <table:table-cell table:style-name="Table1.A1" table:number-columns-spanned="5" office:value-type="string">
            <text:p text:style-name="P12">DESIGN SYSTEM</text:p>
            <text:p text:style-name="P14">Institutional Dark<text:line-break/>Trading Terminal UI</text:p>
            <text:p text:style-name="P15">A reusable UI consistency rulebook for dialogs, tables, panels, forms, menus, toolbars, and configuration screens.</text:p>
            <text:p text:style-name="P17">Style direction: dark - sharp - solid - compact - clean - production grade</text:p>
          </table:table-cell>
          <table:covered-table-cell/>
          <table:covered-table-cell/>
          <table:covered-table-cell/>
          <table:covered-table-cell/>
        </table:table-row>
        <table:table-row table:style-name="Table1.1">
          <table:table-cell table:style-name="Table1.A2" office:value-type="string">
            <text:p text:style-name="Standard"/>
          </table:table-cell>
          <table:table-cell table:style-name="Table1.B2" office:value-type="string">
            <text:p text:style-name="Standard"/>
          </table:table-cell>
          <table:table-cell table:style-name="Table1.C2" office:value-type="string">
            <text:p text:style-name="Standard"/>
          </table:table-cell>
          <table:table-cell table:style-name="Table1.D2" office:value-type="string">
            <text:p text:style-name="Standard"/>
          </table:table-cell>
          <table:table-cell table:style-name="Table1.E2" office:value-type="string">
            <text:p text:style-name="Standard"/>
          </table:table-cell>
        </table:table-row>
      </table:table>
      <text:p text:style-name="Standard"/>
      <text:h text:style-name="P5" text:outline-level="1">1. Style Name and Intent</text:h>
      <text:p text:style-name="Rule_20_Body"><text:span text:style-name="T2">Recommended name: </text:span><text:span text:style-name="T1">Institutional Dark Trading Terminal UI.</text:span></text:p>
      <text:p text:style-name="P29">This style should feel like a serious trading workstation: compact,AMOLED dark styling, sharper borders, dark, sharp, information-dense, calm, and professional. It should not feel like a soft consumer app or colorful SaaS dashboard.</text:p>
      <table:table table:name="Table2" table:style-name="Table2">
        <table:table-column table:style-name="Table2.A" table:number-columns-repeated="2"/>
        <table:table-row table:style-name="Table2.1">
          <table:table-cell table:style-name="Table2.A1" office:value-type="string">
            <text:p text:style-name="P19">The UI must look</text:p>
            <text:p text:style-name="Small_20_Muted">- AMOLED dark styling,</text:p>
            <text:p text:style-name="Small_20_Muted">- sharp</text:p>
            <text:p text:style-name="Small_20_Muted">- solid</text:p>
            <text:p text:style-name="Small_20_Muted">- compact</text:p>
            <text:p text:style-name="Small_20_Muted">- clean</text:p>
            <text:p text:style-name="Small_20_Muted">- serious</text:p>
            <text:p text:style-name="Small_20_Muted">- market-terminal-like</text:p>
            <text:p text:style-name="Small_20_Muted">- information focused</text:p>
          </table:table-cell>
          <table:table-cell table:style-name="Table2.A1" office:value-type="string">
            <text:p text:style-name="P19">The UI must avoid</text:p>
            <text:p text:style-name="Small_20_Muted">- large soft rounded cards</text:p>
            <text:p text:style-name="Small_20_Muted">- random colors</text:p>
            <text:p text:style-name="Small_20_Muted">- heavy shadows</text:p>
            <text:p text:style-name="Small_20_Muted">- glossy gradients</text:p>
            <text:p text:style-name="Small_20_Muted">- consumer-app playfulness</text:p>
            <text:p text:style-name="Small_20_Muted">- oversized controls</text:p>
            <text:p text:style-name="Small_20_Muted">- default system-looking widgets</text:p>
          </table:table-cell>
        </table:table-row>
      </table:table>
      <text:p text:style-name="P3"><text:span text:style-name="T5">Core sentence: </text:span><text:span text:style-name="T2">This is a professional trading workstation, not a casual consumer app.</text:span></text:p>
      <text:h text:style-name="P6" text:outline-level="1">2. Core Visual Tokens</text:h>
      <text:p text:style-name="Rule_20_Body">Use a matte dark layered surface system. The design should be built from dark layers, not bright cards.</text:p>
      <table:table table:name="Table3" table:style-name="Table3">
        <table:table-column table:style-name="Table3.A"/>
        <table:table-column table:style-name="Table3.B" table:number-columns-repeated="2"/>
        <table:table-column table:style-name="Table3.D"/>
        <table:table-header-rows>
          <table:table-row table:style-name="Table3.1">
            <table:table-cell table:style-name="Table3.A1" office:value-type="string">
              <text:p text:style-name="P16">Token</text:p>
            </table:table-cell>
            <table:table-cell table:style-name="Table3.A1" office:value-type="string">
              <text:p text:style-name="P16">Color</text:p>
            </table:table-cell>
            <table:table-cell table:style-name="Table3.A1" office:value-type="string">
              <text:p text:style-name="P16">Sample</text:p>
            </table:table-cell>
            <table:table-cell table:style-name="Table3.A1" office:value-type="string">
              <text:p text:style-name="P16">Use</text:p>
            </table:table-cell>
          </table:table-row>
        </table:table-header-rows>
        <table:table-row table:style-name="Table3.1">
          <table:table-cell table:style-name="Table3.A2" office:value-type="string">
            <text:p text:style-name="P11">BG_APP</text:p>
          </table:table-cell>
          <table:table-cell table:style-name="Table3.B2" office:value-type="string">
            <text:p text:style-name="P20">#050709</text:p>
          </table:table-cell>
          <table:table-cell table:style-name="Table3.C2" office:value-type="string">
            <text:p text:style-name="Standard"/>
          </table:table-cell>
          <table:table-cell table:style-name="Table3.D2" office:value-type="string">
            <text:p text:style-name="P23">Deepest app background</text:p>
          </table:table-cell>
        </table:table-row>
        <table:table-row table:style-name="Table3.1">
          <table:table-cell table:style-name="Table3.A3" office:value-type="string">
            <text:p text:style-name="P11">BG_WINDOW</text:p>
          </table:table-cell>
          <table:table-cell table:style-name="Table3.B3" office:value-type="string">
            <text:p text:style-name="P20">#0A0D12</text:p>
          </table:table-cell>
          <table:table-cell table:style-name="Table3.C3" office:value-type="string">
            <text:p text:style-name="Standard"/>
          </table:table-cell>
          <table:table-cell table:style-name="Table3.D3" office:value-type="string">
            <text:p text:style-name="P23">Main dialog/window background</text:p>
          </table:table-cell>
        </table:table-row>
        <table:table-row table:style-name="Table3.1">
          <table:table-cell table:style-name="Table3.A4" office:value-type="string">
            <text:p text:style-name="P11">BG_PANEL</text:p>
          </table:table-cell>
          <table:table-cell table:style-name="Table3.B4" office:value-type="string">
            <text:p text:style-name="P20">#0F1318</text:p>
          </table:table-cell>
          <table:table-cell table:style-name="Table3.C4" office:value-type="string">
            <text:p text:style-name="Standard"/>
          </table:table-cell>
          <table:table-cell table:style-name="Table3.D4" office:value-type="string">
            <text:p text:style-name="P23">Panels, table bodies</text:p>
          </table:table-cell>
        </table:table-row>
        <table:table-row table:style-name="Table3.1">
          <table:table-cell table:style-name="Table3.A5" office:value-type="string">
            <text:p text:style-name="P11">BG_SECTION</text:p>
          </table:table-cell>
          <table:table-cell table:style-name="Table3.B5" office:value-type="string">
            <text:p text:style-name="P20">#141920</text:p>
          </table:table-cell>
          <table:table-cell table:style-name="Table3.C5" office:value-type="string">
            <text:p text:style-name="Standard"/>
          </table:table-cell>
          <table:table-cell table:style-name="Table3.D5" office:value-type="string">
            <text:p text:style-name="P23">Hover, row separation, inner surface</text:p>
          </table:table-cell>
        </table:table-row>
        <table:table-row table:style-name="Table3.1">
          <table:table-cell table:style-name="Table3.A6" office:value-type="string">
            <text:p text:style-name="P11">BG_BORDER</text:p>
          </table:table-cell>
          <table:table-cell table:style-name="Table3.B6" office:value-type="string">
            <text:p text:style-name="P20">#1A2030</text:p>
          </table:table-cell>
          <table:table-cell table:style-name="Table3.C6" office:value-type="string">
            <text:p text:style-name="Standard"/>
          </table:table-cell>
          <table:table-cell table:style-name="Table3.D6" office:value-type="string">
            <text:p text:style-name="P23">Thin borders</text:p>
          </table:table-cell>
        </table:table-row>
        <table:table-row table:style-name="Table3.1">
          <table:table-cell table:style-name="Table3.A7" office:value-type="string">
            <text:p text:style-name="P11">BG_TITLEBAR</text:p>
          </table:table-cell>
          <table:table-cell table:style-name="Table3.B7" office:value-type="string">
            <text:p text:style-name="P20">#070A0F</text:p>
          </table:table-cell>
          <table:table-cell table:style-name="Table3.C7" office:value-type="string">
            <text:p text:style-name="Standard"/>
          </table:table-cell>
          <table:table-cell table:style-name="Table3.D7" office:value-type="string">
            <text:p text:style-name="P23">Title bars and footers</text:p>
          </table:table-cell>
        </table:table-row>
        <table:table-row table:style-name="Table3.1">
          <table:table-cell table:style-name="Table3.A8" office:value-type="string">
            <text:p text:style-name="P11">ACCENT_BUY_GREEN</text:p>
          </table:table-cell>
          <table:table-cell table:style-name="Table3.B8" office:value-type="string">
            <text:p text:style-name="P20">#00D4A8</text:p>
          </table:table-cell>
          <table:table-cell table:style-name="Table3.C8" office:value-type="string">
            <text:p text:style-name="Standard"/>
          </table:table-cell>
          <table:table-cell table:style-name="Table3.D8" office:value-type="string">
            <text:p text:style-name="P23">Success, buy-side, acknowledge</text:p>
          </table:table-cell>
        </table:table-row>
        <table:table-row table:style-name="Table3.1">
          <table:table-cell table:style-name="Table3.A9" office:value-type="string">
            <text:p text:style-name="P11">ACCENT_SELL_RED</text:p>
          </table:table-cell>
          <table:table-cell table:style-name="Table3.B9" office:value-type="string">
            <text:p text:style-name="P20">#FF4D6A</text:p>
          </table:table-cell>
          <table:table-cell table:style-name="Table3.C9" office:value-type="string">
            <text:p text:style-name="Standard"/>
          </table:table-cell>
          <table:table-cell table:style-name="Table3.D9" office:value-type="string">
            <text:p text:style-name="P23">Danger, delete, sell-side, loss</text:p>
          </table:table-cell>
        </table:table-row>
        <table:table-row table:style-name="Table3.1">
          <table:table-cell table:style-name="Table3.A10" office:value-type="string">
            <text:p text:style-name="P11">ACCENT_WARNING</text:p>
          </table:table-cell>
          <table:table-cell table:style-name="Table3.B10" office:value-type="string">
            <text:p text:style-name="P20">#F59E0B</text:p>
          </table:table-cell>
          <table:table-cell table:style-name="Table3.C10" office:value-type="string">
            <text:p text:style-name="Standard"/>
          </table:table-cell>
          <table:table-cell table:style-name="Table3.D10" office:value-type="string">
            <text:p text:style-name="P23">Active state, alert, warning, selected underline</text:p>
          </table:table-cell>
        </table:table-row>
        <table:table-row table:style-name="Table3.1">
          <table:table-cell table:style-name="Table3.A11" office:value-type="string">
            <text:p text:style-name="P11">ACCENT_INFO_CYAN</text:p>
          </table:table-cell>
          <table:table-cell table:style-name="Table3.B11" office:value-type="string">
            <text:p text:style-name="P20">#00D4FF</text:p>
          </table:table-cell>
          <table:table-cell table:style-name="Table3.C11" office:value-type="string">
            <text:p text:style-name="Standard"/>
          </table:table-cell>
          <table:table-cell table:style-name="Table3.D11" office:value-type="string">
            <text:p text:style-name="P23">Info, utility, pinned state</text:p>
          </table:table-cell>
        </table:table-row>
        <table:table-row table:style-name="Table3.1">
          <table:table-cell table:style-name="Table3.A12" office:value-type="string">
            <text:p text:style-name="P11">TEXT_PRIMARY</text:p>
          </table:table-cell>
          <table:table-cell table:style-name="Table3.B12" office:value-type="string">
            <text:p text:style-name="P20">#E8F0FF</text:p>
          </table:table-cell>
          <table:table-cell table:style-name="Table3.C12" office:value-type="string">
            <text:p text:style-name="Standard"/>
          </table:table-cell>
          <table:table-cell table:style-name="Table3.D12" office:value-type="string">
            <text:p text:style-name="P23">Primary text on dark backgrounds</text:p>
          </table:table-cell>
        </table:table-row>
        <table:table-row table:style-name="Table3.1">
          <table:table-cell table:style-name="Table3.A13" office:value-type="string">
            <text:p text:style-name="P11">TEXT_SECONDARY</text:p>
          </table:table-cell>
          <table:table-cell table:style-name="Table3.B13" office:value-type="string">
            <text:p text:style-name="P20">#A8BCD4</text:p>
          </table:table-cell>
          <table:table-cell table:style-name="Table3.C13" office:value-type="string">
            <text:p text:style-name="Standard"/>
          </table:table-cell>
          <table:table-cell table:style-name="Table3.D13" office:value-type="string">
            <text:p text:style-name="P23">Secondary text</text:p>
          </table:table-cell>
        </table:table-row>
        <text:soft-page-break/>
        <table:table-row table:style-name="Table3.1">
          <table:table-cell table:style-name="Table3.A14" office:value-type="string">
            <text:p text:style-name="P11">TEXT_MUTED</text:p>
          </table:table-cell>
          <table:table-cell table:style-name="Table3.B14" office:value-type="string">
            <text:p text:style-name="P20">#5A7090</text:p>
          </table:table-cell>
          <table:table-cell table:style-name="Table3.C14" office:value-type="string">
            <text:p text:style-name="Standard"/>
          </table:table-cell>
          <table:table-cell table:style-name="Table3.D14" office:value-type="string">
            <text:p text:style-name="P23">Muted labels and inactive tabs</text:p>
          </table:table-cell>
        </table:table-row>
        <table:table-row table:style-name="Table3.1">
          <table:table-cell table:style-name="Table3.A15" office:value-type="string">
            <text:p text:style-name="P11">TEXT_DISABLED</text:p>
          </table:table-cell>
          <table:table-cell table:style-name="Table3.B15" office:value-type="string">
            <text:p text:style-name="P20">#2A3A50</text:p>
          </table:table-cell>
          <table:table-cell table:style-name="Table3.C15" office:value-type="string">
            <text:p text:style-name="Standard"/>
          </table:table-cell>
          <table:table-cell table:style-name="Table3.D15" office:value-type="string">
            <text:p text:style-name="P23">Disabled/deep muted text</text:p>
          </table:table-cell>
        </table:table-row>
        <table:table-row table:style-name="Table3.1">
          <table:table-cell table:style-name="Table3.A16" office:value-type="string">
            <text:p text:style-name="P11">SELECTION_BG</text:p>
          </table:table-cell>
          <table:table-cell table:style-name="Table3.B16" office:value-type="string">
            <text:p text:style-name="P20">#1A2840</text:p>
          </table:table-cell>
          <table:table-cell table:style-name="Table3.C16" office:value-type="string">
            <text:p text:style-name="Standard"/>
          </table:table-cell>
          <table:table-cell table:style-name="Table3.D16" office:value-type="string">
            <text:p text:style-name="P23">Selected row/background</text:p>
          </table:table-cell>
        </table:table-row>
      </table:table>
      <text:h text:style-name="P6" text:outline-level="1">3. Global Rules</text:h>
      <text:p text:style-name="P7"><text:span text:style-name="T3">Shape language: </text:span><text:span text:style-name="T4">Use sharp geometry. Preferred border radius is 2px. 3px or 4px is allowed only when needed. Avoid 8px, 12px, 16px, or pill-shaped controls.</text:span></text:p>
      <text:p text:style-name="P7"><text:span text:style-name="T3">Borders: </text:span><text:span text:style-name="T4">Use thin 1px borders and subtle separators instead of shadows. The UI should be separated by lines, not by large floating cards.</text:span></text:p>
      <text:p text:style-name="P7"><text:span text:style-name="T3">Density: </text:span><text:span text:style-name="T4">Keep the interface compact but readable. Trading UI should show information efficiently without becoming cramped.</text:span></text:p>
      <text:p text:style-name="P7"><text:span text:style-name="T3">Accent discipline: </text:span><text:span text:style-name="T4">Every accent color must communicate state or meaning. Do not use random colors for decoration.</text:span></text:p>
      <text:p text:style-name="P7"><text:span text:style-name="T3">Motion: </text:span><text:span text:style-name="T4">Avoid heavy animation. Any animation must be short, functional, and almost invisible.</text:span></text:p>
      <text:p text:style-name="P7">Text discipline: Avoid unnecessary text, repeated subtexts, duplicate helper lines, and obvious explanations. Use short labels, clear tooltips, and concise status text only when they add value.</text:p>
      <text:p text:style-name="P7">Font discipline: Use modern UI fonts consistently across dialogs, tables, menus, and forms. The font should feel calm, subtle, and professional, not thick, loud, or decorative.</text:p>
      <text:p text:style-name="P7">Asset discipline: Check the project assets/icons folders before designing actions. Use existing icons whenever possible instead of forcing extra button text.</text:p>
      <text:h text:style-name="P6" text:outline-level="1">4. Typography</text:h>
      <text:p text:style-name="Rule_20_Body">Use a clean modern UI font stack for all normal UI text and market numbers. Prefer Inter, Aptos, Segoe UI, Roboto, or Noto Sans. Keep weights subtle and readable. Avoid thick, decorative, flashy, or distracting fonts. Use monospace only for code, raw logs, scan clauses, IDs, and technical debug text.</text:p>
      <table:table table:name="Table4" table:style-name="Table4">
        <table:table-column table:style-name="Table4.A"/>
        <table:table-column table:style-name="Table4.B" table:number-columns-repeated="2"/>
        <table:table-column table:style-name="Table4.D"/>
        <table:table-header-rows>
          <table:table-row table:style-name="Table4.1">
            <table:table-cell table:style-name="Table4.A1" office:value-type="string">
              <text:p text:style-name="P16">Element</text:p>
            </table:table-cell>
            <table:table-cell table:style-name="Table4.A1" office:value-type="string">
              <text:p text:style-name="P16">Font</text:p>
            </table:table-cell>
            <table:table-cell table:style-name="Table4.A1" office:value-type="string">
              <text:p text:style-name="P16">Size</text:p>
            </table:table-cell>
            <table:table-cell table:style-name="Table4.A1" office:value-type="string">
              <text:p text:style-name="P16">Weight</text:p>
            </table:table-cell>
          </table:table-row>
        </table:table-header-rows>
        <table:table-row table:style-name="Table4.1">
          <table:table-cell table:style-name="Table4.A2" office:value-type="string">
            <text:p text:style-name="P23">Dialog title / badge</text:p>
          </table:table-cell>
          <table:table-cell table:style-name="Table4.B2" office:value-type="string">
            <text:p text:style-name="P21">Inter / Aptos / Segoe UI</text:p>
          </table:table-cell>
          <table:table-cell table:style-name="Table4.C2" office:value-type="string">
            <text:p text:style-name="P21">10-13px</text:p>
          </table:table-cell>
          <table:table-cell table:style-name="Table4.D2" office:value-type="string">
            <text:p text:style-name="P21">700-800</text:p>
          </table:table-cell>
        </table:table-row>
        <table:table-row table:style-name="Table4.1">
          <table:table-cell table:style-name="Table4.A3" office:value-type="string">
            <text:p text:style-name="P23">Table body</text:p>
          </table:table-cell>
          <table:table-cell table:style-name="Table4.B3" office:value-type="string">
            <text:p text:style-name="P21">Aptos / Segoe UI</text:p>
          </table:table-cell>
          <table:table-cell table:style-name="Table4.C3" office:value-type="string">
            <text:p text:style-name="P21">10-12px</text:p>
          </table:table-cell>
          <table:table-cell table:style-name="Table4.D3" office:value-type="string">
            <text:p text:style-name="P21">500-600</text:p>
          </table:table-cell>
        </table:table-row>
        <table:table-row table:style-name="Table4.1">
          <table:table-cell table:style-name="Table4.A4" office:value-type="string">
            <text:p text:style-name="P23">Number / value / timestamp</text:p>
          </table:table-cell>
          <table:table-cell table:style-name="Table4.B4" office:value-type="string">
            <text:p text:style-name="P21">Inter / Aptos / Segoe UI</text:p>
          </table:table-cell>
          <table:table-cell table:style-name="Table4.C4" office:value-type="string">
            <text:p text:style-name="P21">10-12px</text:p>
          </table:table-cell>
          <table:table-cell table:style-name="Table4.D4" office:value-type="string">
            <text:p text:style-name="P21">600</text:p>
          </table:table-cell>
        </table:table-row>
        <table:table-row table:style-name="Table4.1">
          <table:table-cell table:style-name="Table4.A5" office:value-type="string">
            <text:p text:style-name="P23">Header labels</text:p>
          </table:table-cell>
          <table:table-cell table:style-name="Table4.B5" office:value-type="string">
            <text:p text:style-name="P21">Aptos / Segoe UI</text:p>
          </table:table-cell>
          <table:table-cell table:style-name="Table4.C5" office:value-type="string">
            <text:p text:style-name="P21">9-10px</text:p>
          </table:table-cell>
          <table:table-cell table:style-name="Table4.D5" office:value-type="string">
            <text:p text:style-name="P21">800</text:p>
          </table:table-cell>
        </table:table-row>
        <table:table-row table:style-name="Table4.1">
          <table:table-cell table:style-name="Table4.A6" office:value-type="string">
            <text:p text:style-name="P23">Buttons</text:p>
          </table:table-cell>
          <table:table-cell table:style-name="Table4.B6" office:value-type="string">
            <text:p text:style-name="P21">Aptos / Segoe UI</text:p>
          </table:table-cell>
          <table:table-cell table:style-name="Table4.C6" office:value-type="string">
            <text:p text:style-name="P21">10-12px</text:p>
          </table:table-cell>
          <table:table-cell table:style-name="Table4.D6" office:value-type="string">
            <text:p text:style-name="P21">700</text:p>
          </table:table-cell>
        </table:table-row>
        <table:table-row table:style-name="Table4.1">
          <table:table-cell table:style-name="Table4.A7" office:value-type="string">
            <text:p text:style-name="P23">Form labels</text:p>
          </table:table-cell>
          <table:table-cell table:style-name="Table4.B7" office:value-type="string">
            <text:p text:style-name="P21">Aptos / Segoe UI</text:p>
          </table:table-cell>
          <table:table-cell table:style-name="Table4.C7" office:value-type="string">
            <text:p text:style-name="P21">11-12px</text:p>
          </table:table-cell>
          <table:table-cell table:style-name="Table4.D7" office:value-type="string">
            <text:p text:style-name="P21">600</text:p>
          </table:table-cell>
        </table:table-row>
      </table:table>
      <text:p text:style-name="P8">UI_FONT = "'Inter', 'Aptos', 'Segoe UI', 'Roboto', 'Noto Sans', sans-serif"<text:line-break/>NUM_FONT = "'Inter', 'Aptos', 'Segoe UI', sans-serif"<text:line-break/>MONO = "'JetBrains Mono', 'Consolas', monospace"</text:p>
      <text:h text:style-name="P6" text:outline-level="1"><text:soft-page-break/>5. Dialog Structure</text:h>
      <text:p text:style-name="P29">Every dialog should use a consistent structure: compact title bar, content body, and thin footer/status area, AMOLED dark styling, sharper borders,.</text:p>
      <text:p text:style-name="P10">+--------------------------------------+<text:line-break/>| TITLE <text:s text:c="7"/>actions <text:s/>close <text:s/>|<text:line-break/>+--------------------------------------+<text:line-break/>| Main content <text:s text:c="24"/>|<text:line-break/>| tables / forms / settings <text:s text:c="11"/>|<text:line-break/>+--------------------------------------+<text:line-break/>| status text / summary / small actions|<text:line-break/>+--------------------------------------+</text:p>
      <text:p text:style-name="Rule_20_Body">- Use a darker title bar than the body.</text:p>
      <text:p text:style-name="Rule_20_Body">- Use a footer that visually matches the title bar.</text:p>
      <text:p text:style-name="Rule_20_Body">- Use a thin outer border.</text:p>
      <text:p text:style-name="Rule_20_Body">- Use minimal close, refresh, settings, edit, delete, acknowledge, and open buttons. Prefer compact icon buttons when matching assets are available.</text:p>
      <text:p text:style-name="Rule_20_Body">- Close hover should use red.</text:p>
      <text:p text:style-name="Rule_20_Body">- Avoid large decorative headers.</text:p>
      <text:h text:style-name="P6" text:outline-level="1">6. Table Design Rules</text:h>
      <text:p text:style-name="Rule_20_Body">Tables are the most important terminal component. They must be compact, keyboard-friendly, readable, and visually calm.</text:p>
      <text:p text:style-name="Rule_20_Body">- Hide vertical headers unless absolutely needed.</text:p>
      <text:p text:style-name="Rule_20_Body">- Use row selection and alternate row color.</text:p>
      <text:p text:style-name="Rule_20_Body">- Use muted uppercase headers.</text:p>
      <text:p text:style-name="Rule_20_Body">Use modern UI number typography for prices, quantities, percentage values, timestamps, balances, and P&amp;L. Numbers should look clean, sharp, calm, and readable in compact tables. Use monospace only for code, raw logs, scan clauses, IDs, or technical debug text.</text:p>
      <text:p text:style-name="Rule_20_Body">- Right-align numeric values.</text:p>
      <text:p text:style-name="Rule_20_Body">- Use color only for state, not decoration.</text:p>
      <text:p text:style-name="P8">QTableWidget {<text:line-break/> <text:s text:c="3"/>background: #0A0D12;<text:line-break/> <text:s text:c="3"/>alternate-background-color: #0F1318;<text:line-break/> <text:s text:c="3"/>gridline-color: transparent;<text:line-break/> <text:s text:c="3"/>border: none;<text:line-break/> <text:s text:c="3"/>outline: none;<text:line-break/> <text:s text:c="3"/>selection-background-color: #1A2840;<text:line-break/> <text:s text:c="3"/>color: #E8F0FF;<text:line-break/> <text:s text:c="3"/>font-size: 11px;<text:line-break/>}<text:line-break/><text:line-break/>QHeaderView::section {<text:line-break/> <text:s text:c="3"/>background: #0F1318;<text:line-break/> <text:s text:c="3"/>color: #5A7090;<text:line-break/> <text:s text:c="3"/>font-size: 9px;<text:line-break/> <text:s text:c="3"/>font-weight: 800;<text:line-break/> <text:s text:c="3"/>letter-spacing: 1.2px;<text:line-break/> <text:s text:c="3"/>border-bottom: 1px solid #1A2030;<text:line-break/>}</text:p>
      <text:h text:style-name="P6" text:outline-level="1"><text:soft-page-break/>7. Component Rules</text:h>
      <text:p text:style-name="P7">Buttons: Small, sharp, minimal. Utility buttons should be transparent by default. Destructive buttons use red only for meaning. Confirm/acknowledge uses green. Info or pinned state uses cyan. When a suitable asset exists, prefer a compact icon button with tooltip/accessibility text instead of a wide text button.</text:p>
      <text:p text:style-name="P7"><text:span text:style-name="T3">Forms and inputs: </text:span><text:span text:style-name="T4">Dark fields, thin borders, compact height, muted placeholders, accent border on focus. Avoid default system combo boxes and white inputs.</text:span></text:p>
      <text:p text:style-name="P7"><text:span text:style-name="T3">Tabs: </text:span><text:span text:style-name="T4">Flat and underline-based. No pill tabs. Selected tab uses amber underline. Inactive tabs are muted. Counts may be included in tab text.</text:span></text:p>
      <text:p text:style-name="P7"><text:span text:style-name="T3">Status bars: </text:span><text:span text:style-name="T4">Thin, calm, and informative. Use for auto-refresh state, active counts, selected symbol, connection state, and last update time.</text:span></text:p>
      <text:p text:style-name="P7"><text:span text:style-name="T3">Scrollbars: </text:span><text:span text:style-name="T4">Thin and low-contrast. They should be visible only as functional controls, not design elements.</text:span></text:p>
      <text:p text:style-name="P7">Icons: Before adding text-heavy action buttons, inspect the project assets/icons folders and reuse existing clean SVG/PNG icons whenever available. Use tick/check for acknowledge/save, delete/trash for remove, edit/pencil for configure, refresh, close, settings, pin, dock, open/external-link, search, and filter icons where they improve clarity. Icons must stay small, simple, aligned, and unclipped.</text:p>
      <text:h text:style-name="P6" text:outline-level="1">8. Layout Density and Spacing</text:h>
      <table:table table:name="Table5" table:style-name="Table5">
        <table:table-column table:style-name="Table5.A" table:number-columns-repeated="2"/>
        <table:table-header-rows>
          <table:table-row table:style-name="Table5.1">
            <table:table-cell table:style-name="Table5.A1" office:value-type="string">
              <text:p text:style-name="P16">Area</text:p>
            </table:table-cell>
            <table:table-cell table:style-name="Table5.A1" office:value-type="string">
              <text:p text:style-name="P16">Recommended size</text:p>
            </table:table-cell>
          </table:table-row>
        </table:table-header-rows>
        <table:table-row table:style-name="Table5.1">
          <table:table-cell table:style-name="Table5.A2" office:value-type="string">
            <text:p text:style-name="P23">Title bar height</text:p>
          </table:table-cell>
          <table:table-cell table:style-name="Table5.B2" office:value-type="string">
            <text:p text:style-name="P21">28px</text:p>
          </table:table-cell>
        </table:table-row>
        <table:table-row table:style-name="Table5.1">
          <table:table-cell table:style-name="Table5.A3" office:value-type="string">
            <text:p text:style-name="P23">Footer height</text:p>
          </table:table-cell>
          <table:table-cell table:style-name="Table5.B3" office:value-type="string">
            <text:p text:style-name="P21">24-28px</text:p>
          </table:table-cell>
        </table:table-row>
        <table:table-row table:style-name="Table5.1">
          <table:table-cell table:style-name="Table5.A4" office:value-type="string">
            <text:p text:style-name="P23">Table row height</text:p>
          </table:table-cell>
          <table:table-cell table:style-name="Table5.B4" office:value-type="string">
            <text:p text:style-name="P21">22-26px, usually 24px</text:p>
          </table:table-cell>
        </table:table-row>
        <table:table-row table:style-name="Table5.1">
          <table:table-cell table:style-name="Table5.A5" office:value-type="string">
            <text:p text:style-name="P23">Small icon button</text:p>
          </table:table-cell>
          <table:table-cell table:style-name="Table5.B5" office:value-type="string">
            <text:p text:style-name="P21">20-24px</text:p>
          </table:table-cell>
        </table:table-row>
        <table:table-row table:style-name="Table5.1">
          <table:table-cell table:style-name="Table5.A6" office:value-type="string">
            <text:p text:style-name="P23">Dialog body padding</text:p>
          </table:table-cell>
          <table:table-cell table:style-name="Table5.B6" office:value-type="string">
            <text:p text:style-name="P21">8px</text:p>
          </table:table-cell>
        </table:table-row>
        <table:table-row table:style-name="Table5.1">
          <table:table-cell table:style-name="Table5.A7" office:value-type="string">
            <text:p text:style-name="P23">Inner spacing</text:p>
          </table:table-cell>
          <table:table-cell table:style-name="Table5.B7" office:value-type="string">
            <text:p text:style-name="P21">4-8px</text:p>
          </table:table-cell>
        </table:table-row>
        <table:table-row table:style-name="Table5.1">
          <table:table-cell table:style-name="Table5.A8" office:value-type="string">
            <text:p text:style-name="P23">Table cell horizontal padding</text:p>
          </table:table-cell>
          <table:table-cell table:style-name="Table5.B8" office:value-type="string">
            <text:p text:style-name="P21">6px</text:p>
          </table:table-cell>
        </table:table-row>
      </table:table>
      <text:h text:style-name="P6" text:outline-level="1">9. Market Data Color Semantics</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6">Data type</text:p>
            </table:table-cell>
            <table:table-cell table:style-name="Table6.A1" office:value-type="string">
              <text:p text:style-name="P16">Color role</text:p>
            </table:table-cell>
            <table:table-cell table:style-name="Table6.A1" office:value-type="string">
              <text:p text:style-name="P16">Rule</text:p>
            </table:table-cell>
          </table:table-row>
        </table:table-header-rows>
        <table:table-row table:style-name="Table6.1">
          <table:table-cell table:style-name="Table6.A2" office:value-type="string">
            <text:p text:style-name="P23">Profit / positive move / buy</text:p>
          </table:table-cell>
          <table:table-cell table:style-name="Table6.B2" office:value-type="string">
            <text:p text:style-name="P24">Green</text:p>
          </table:table-cell>
          <table:table-cell table:style-name="Table6.C2" office:value-type="string">
            <text:p text:style-name="P23">Use for success and positive market movement.</text:p>
          </table:table-cell>
        </table:table-row>
        <table:table-row table:style-name="Table6.1">
          <table:table-cell table:style-name="Table6.A3" office:value-type="string">
            <text:p text:style-name="P23">Loss / negative move / sell</text:p>
          </table:table-cell>
          <table:table-cell table:style-name="Table6.B3" office:value-type="string">
            <text:p text:style-name="P25">Red</text:p>
          </table:table-cell>
          <table:table-cell table:style-name="Table6.C3" office:value-type="string">
            <text:p text:style-name="P23">Use for risk, danger, delete, and loss.</text:p>
          </table:table-cell>
        </table:table-row>
        <table:table-row table:style-name="Table6.1">
          <table:table-cell table:style-name="Table6.A4" office:value-type="string">
            <text:p text:style-name="P23">Alert / warning / active</text:p>
          </table:table-cell>
          <table:table-cell table:style-name="Table6.B4" office:value-type="string">
            <text:p text:style-name="P13">Amber</text:p>
          </table:table-cell>
          <table:table-cell table:style-name="Table6.C4" office:value-type="string">
            <text:p text:style-name="P23">Use for alerts, selected underline, and important pending state.</text:p>
          </table:table-cell>
        </table:table-row>
        <table:table-row table:style-name="Table6.1">
          <table:table-cell table:style-name="Table6.A5" office:value-type="string">
            <text:p text:style-name="P23">Info / utility / pinned</text:p>
          </table:table-cell>
          <table:table-cell table:style-name="Table6.B5" office:value-type="string">
            <text:p text:style-name="P18">Cyan</text:p>
          </table:table-cell>
          <table:table-cell table:style-name="Table6.C5" office:value-type="string">
            <text:p text:style-name="P23">Use for utility states and informational highlights.</text:p>
          </table:table-cell>
        </table:table-row>
        <table:table-row table:style-name="Table6.1">
          <table:table-cell table:style-name="Table6.A6" office:value-type="string">
            <text:p text:style-name="P23">Neutral prices</text:p>
          </table:table-cell>
          <table:table-cell table:style-name="Table6.B6" office:value-type="string">
            <text:p text:style-name="P26">Primary text</text:p>
          </table:table-cell>
          <table:table-cell table:style-name="Table6.C6" office:value-type="string">
            <text:p text:style-name="P23">Do not color every price; color only when state matters.</text:p>
          </table:table-cell>
        </table:table-row>
        <table:table-row table:style-name="Table6.1">
          <table:table-cell table:style-name="Table6.A7" office:value-type="string">
            <text:p text:style-name="P23">Metadata</text:p>
          </table:table-cell>
          <table:table-cell table:style-name="Table6.B7" office:value-type="string">
            <text:p text:style-name="P22">Muted text</text:p>
          </table:table-cell>
          <table:table-cell table:style-name="Table6.C7" office:value-type="string">
            <text:p text:style-name="P23">Use for timestamps, labels, and inactive <text:soft-page-break/>information.</text:p>
          </table:table-cell>
        </table:table-row>
      </table:table>
      <text:h text:style-name="P6" text:outline-level="1">10. Backend Safety Rule</text:h>
      <text:p text:style-name="Rule_20_Body">When redesigning UI, never break backend connections. A visual rewrite should improve layout, styling, readability, and interaction polish without changing existing external hooks.</text:p>
      <table:table table:name="Table7" table:style-name="Table7">
        <table:table-column table:style-name="Table7.A" table:number-columns-repeated="2"/>
        <table:table-header-rows>
          <table:table-row table:style-name="Table7.1">
            <table:table-cell table:style-name="Table7.A1" office:value-type="string">
              <text:p text:style-name="P16">Do not change without explicit approval</text:p>
            </table:table-cell>
            <table:table-cell table:style-name="Table7.A1" office:value-type="string">
              <text:p text:style-name="P16">Safe to change during visual rewrite</text:p>
            </table:table-cell>
          </table:table-row>
        </table:table-header-rows>
        <table:table-row table:style-name="Table7.1">
          <table:table-cell table:style-name="Table7.A2" office:value-type="string">
            <text:p text:style-name="P23">manager method names</text:p>
          </table:table-cell>
          <table:table-cell table:style-name="Table7.B2" office:value-type="string">
            <text:p text:style-name="P23">layout</text:p>
          </table:table-cell>
        </table:table-row>
        <table:table-row table:style-name="Table7.1">
          <table:table-cell table:style-name="Table7.A3" office:value-type="string">
            <text:p text:style-name="P23">signals and slots</text:p>
          </table:table-cell>
          <table:table-cell table:style-name="Table7.B3" office:value-type="string">
            <text:p text:style-name="P23">spacing</text:p>
          </table:table-cell>
        </table:table-row>
        <table:table-row table:style-name="Table7.1">
          <table:table-cell table:style-name="Table7.A4" office:value-type="string">
            <text:p text:style-name="P23">public class names</text:p>
          </table:table-cell>
          <table:table-cell table:style-name="Table7.B4" office:value-type="string">
            <text:p text:style-name="P23">widget grouping</text:p>
          </table:table-cell>
        </table:table-row>
        <table:table-row table:style-name="Table7.1">
          <table:table-cell table:style-name="Table7.A5" office:value-type="string">
            <text:p text:style-name="P23">constructor arguments</text:p>
          </table:table-cell>
          <table:table-cell table:style-name="Table7.B5" office:value-type="string">
            <text:p text:style-name="P23">colors</text:p>
          </table:table-cell>
        </table:table-row>
        <table:table-row table:style-name="Table7.1">
          <table:table-cell table:style-name="Table7.A6" office:value-type="string">
            <text:p text:style-name="P23">stored state keys</text:p>
          </table:table-cell>
          <table:table-cell table:style-name="Table7.B6" office:value-type="string">
            <text:p text:style-name="P23">fonts</text:p>
          </table:table-cell>
        </table:table-row>
        <table:table-row table:style-name="Table7.1">
          <table:table-cell table:style-name="Table7.A7" office:value-type="string">
            <text:p text:style-name="P23">timers</text:p>
          </table:table-cell>
          <table:table-cell table:style-name="Table7.B7" office:value-type="string">
            <text:p text:style-name="P23">object names for styling</text:p>
          </table:table-cell>
        </table:table-row>
        <table:table-row table:style-name="Table7.1">
          <table:table-cell table:style-name="Table7.A8" office:value-type="string">
            <text:p text:style-name="P23">chart navigation hooks</text:p>
          </table:table-cell>
          <table:table-cell table:style-name="Table7.B8" office:value-type="string">
            <text:p text:style-name="P23">hover/focus states</text:p>
          </table:table-cell>
        </table:table-row>
        <table:table-row table:style-name="Table7.1">
          <table:table-cell table:style-name="Table7.A9" office:value-type="string">
            <text:p text:style-name="P23">order execution hooks</text:p>
          </table:table-cell>
          <table:table-cell table:style-name="Table7.B9" office:value-type="string">
            <text:p text:style-name="P23">table sizing</text:p>
          </table:table-cell>
        </table:table-row>
        <table:table-row table:style-name="Table7.1">
          <table:table-cell table:style-name="Table7.A10" office:value-type="string">
            <text:p text:style-name="P23">data model fields</text:p>
          </table:table-cell>
          <table:table-cell table:style-name="Table7.B10" office:value-type="string">
            <text:p text:style-name="P23">visual hierarchy</text:p>
          </table:table-cell>
        </table:table-row>
      </table:table>
      <text:h text:style-name="P6" text:outline-level="1">11. Do / Do Not</text:h>
      <table:table table:name="Table8" table:style-name="Table8">
        <table:table-column table:style-name="Table8.A" table:number-columns-repeated="2"/>
        <table:table-row table:style-name="Table8.1">
          <table:table-cell table:style-name="Table8.A1" office:value-type="string">
            <text:p text:style-name="P27">Do</text:p>
            <text:p text:style-name="Small_20_Muted">- Use matte dark backgrounds, AMOLED dark styling, sharper borders,</text:p>
            <text:p text:style-name="Small_20_Muted">- Use thin borders</text:p>
            <text:p text:style-name="Small_20_Muted">- Use compact rows</text:p>
            <text:p text:style-name="Small_20_Muted">- Use modern UI fonts and number typography</text:p>
            <text:p text:style-name="Small_20_Muted">- Use purposeful accent colors</text:p>
            <text:p text:style-name="Small_20_Muted">- Use sharp 2px corners</text:p>
            <text:p text:style-name="Small_20_Muted">- Use small icon buttons</text:p>
            <text:p text:style-name="Small_20_Muted">- Check assets/icons before using text-only actions</text:p>
            <text:p text:style-name="Small_20_Muted">- Remove repeated helper text and obvious subtexts</text:p>
            <text:p text:style-name="Small_20_Muted">- Use clean tables and status footers</text:p>
          </table:table-cell>
          <table:table-cell table:style-name="Table8.B1" office:value-type="string">
            <text:p text:style-name="P28">Do not</text:p>
            <text:p text:style-name="Small_20_Muted">- Use large rounded cards</text:p>
            <text:p text:style-name="Small_20_Muted">- Use random colors</text:p>
            <text:p text:style-name="Small_20_Muted">- Use heavy shadows</text:p>
            <text:p text:style-name="Small_20_Muted">- Use glossy gradients</text:p>
            <text:p text:style-name="Small_20_Muted">- Use huge buttons</text:p>
            <text:p text:style-name="Small_20_Muted">- Use default system-looking widgets</text:p>
            <text:p text:style-name="Small_20_Muted">- Use thick, flashy, or distracting fonts</text:p>
            <text:p text:style-name="Small_20_Muted">- Repeat obvious subtitles, helper labels, or descriptions</text:p>
            <text:p text:style-name="Small_20_Muted">- Ignore available asset icons and use clipped text buttons</text:p>
            <text:p text:style-name="Small_20_Muted">- Make trading tables too spacious</text:p>
            <text:p text:style-name="Small_20_Muted">- Break backend signals or hooks</text:p>
          </table:table-cell>
        </table:table-row>
      </table:table>
      <text:h text:style-name="P6" text:outline-level="1">12. Reusable Master Prompt</text:h>
      <text:p text:style-name="Rule_20_Body">Use this prompt whenever redesigning a dialog, widget, table, toolbar, menu, or configuration panel.</text:p>
      <text:p text:style-name="P9">Rewrite this UI using my Institutional Dark Trading Terminal UI style.<text:line-break/><text:line-break/>The design must be dark, sharp, solid, compact, clean, and production-grade. It should look like a professional trading terminal, not a consumer app.<text:line-break/><text:line-break/><text:soft-page-break/>Use matte dark layered backgrounds, thin borders, 2px sharp corners, compact spacing, small uppercase section labels, muted secondary text, and purposeful accent colors.<text:line-break/><text:line-break/>Use amber for active alerts/warnings/selected underline, green for success/confirm/buy/acknowledge, red for danger/delete/sell/loss, cyan for info/utility/pinned state, and muted blue-gray for labels and inactive text.<text:line-break/><text:line-break/>Use modern UI fonts for all normal UI text and market numbers. Prefer Inter, Aptos, Segoe UI, Roboto, or Noto Sans. Keep font weight subtle, calm, and readable. Avoid thick, flashy, decorative, or distracting fonts. Use monospace only for code, raw logs, scan clauses, IDs, and technical debug text.<text:line-break/><text:line-break/>Use compact table rows, no visible grid, alternate row colors, muted headers, row selection, right-aligned numeric values, and modern UI number typography for prices, timestamps, quantities, percentages, balances, and P&amp;L.<text:line-break/><text:line-break/>Do not add unnecessary labels, repeated helper subtexts, duplicate descriptions, or obvious explanatory text. Keep copy short, functional, and useful.<text:line-break/><text:line-break/>Before creating text-only action buttons, check the project assets/icons folders. Reuse available SVG/PNG icons such as tick/check, delete/trash, edit, refresh, close, settings, pin, dock, open, search, and filter wherever they improve clarity. Use compact icon buttons with tooltips/accessibility names, and avoid clipped button text.<text:line-break/><text:line-break/>Buttons must be small, sharp, and minimal. Avoid large rounded buttons, gradients, heavy shadows, glassmorphism, and colorful decoration.<text:line-break/><text:line-break/>Keep all backend connections intact. Do not rename public classes, constructor arguments, manager calls, signals, slots, timers, config keys, or existing external hooks unless I explicitly ask. Only improve layout, styling, readability, and UI consistency.</text:p>
      <text:p text:style-name="Standard"/>
      <text:h text:style-name="P5" text:outline-level="1">13. Recommended PySide6 Style Token Block</text:h>
      <text:p text:style-name="P8">_BG0 = "#050709"<text:line-break/>_BG1 = "#0a0d12"<text:line-break/>_BG2 = "#0f1318"<text:line-break/>_BG3 = "#141920"<text:line-break/>_BG4 = "#1a2030"<text:line-break/>_BGTB = "#070a0f"<text:line-break/>_BULL = "#00d4a8"<text:line-break/>_BEAR = "#ff4d6a"<text:line-break/>_AMBER = "#f59e0b"<text:line-break/>_CYAN = "#00d4ff"<text:line-break/>_BLUE = "#3b82f6"<text:line-break/>_T0 = "#e8f0ff"<text:line-break/>_T1 = "#a8bcd4"<text:line-break/>_T2 = "#5a7090"<text:line-break/>_T3 = "#2a3a50"<text:line-break/>_SEL = "#1a2840"<text:line-break/>_UI_FONT = "'Inter', 'Aptos', 'Segoe UI', 'Roboto', 'Noto Sans', sans-serif"<text:line-break/>_NUM_FONT = "'Inter', 'Aptos', 'Segoe UI', sans-serif"<text:line-break/>_MONO = "'JetBrains Mono', 'Consolas', monospace"<text:line-break/>_ROW_H = 24</text:p>
      <text:h text:style-name="P6" text:outline-level="1">14. Final UI Review Checklist</text:h>
      <text:p text:style-name="Rule_20_Body">[ ] Does the screen look like a professional trading workstation?</text:p>
      <text:p text:style-name="Rule_20_Body">[ ] Are colors meaningful and consistent?</text:p>
      <text:p text:style-name="Rule_20_Body">[ ] Are table rows compact and readable?</text:p>
      <text:p text:style-name="Rule_20_Body">[ ] Are numbers using modern UI number typography and aligned properly?</text:p>
      <text:p text:style-name="Rule_20_Body">[ ] Are destructive actions red and confirmation actions green?</text:p>
      <text:p text:style-name="Rule_20_Body">[ ] Are borders thin and corners sharp?</text:p>
      <text:p text:style-name="Rule_20_Body">[ ] Are hover, selected, focused, and disabled states defined?</text:p>
      <text:p text:style-name="Rule_20_Body">[ ] Are backend connections preserved?</text:p>
      <text:p text:style-name="Rule_20_Body">[ ] Are modern UI fonts used consistently without heavy or distracting weights?</text:p>
      <text:p text:style-name="Rule_20_Body">[ ] Are repeated subtitles, helper text, and duplicate descriptions removed?</text:p>
      <text:p text:style-name="Rule_20_Body">[ ] Were available assets/icons checked and used where they improve action clarity?</text:p>
      <text:p text:style-name="Rule_20_Body">[ ] Does the UI still feel calm when filled with real market data?</text:p>
      <text:h text:style-name="P6" text:outline-level="1">15. AMOLED Dark Styling Addendum</text:h>
      <text:p text:style-name="Rule_20_Body">AMOLED dark styling should be treated as the default rendering direction for this terminal UI. The interface should feel black, calm, and precise, with only small lifted surfaces used to separate panels, controls, and table areas.</text:p>
      <text:p text:style-name="Rule_20_Body">- Use TRUE_BLACK #000000 or BG_APP #050709 for the deepest app shell, menu bars, header toolbars, chart background, and major window chrome.</text:p>
      <text:p text:style-name="Rule_20_Body">- Use BG_WINDOW #0A0D12, BG_PANEL #0F1318, and BG_SECTION #141920 only as subtle lifted layers. Avoid bright grey cards, washed-out panels, and default system backgrounds.</text:p>
      <text:p text:style-name="Rule_20_Body">- Borders should remain thin and low-contrast: BG_BORDER #1A2030 for normal separation and #25344A only for hover, focus, or active edges. Keep corners sharp at 2px.</text:p>
      <text:p text:style-name="Rule_20_Body">- Text should be readable but not loud. Prefer TEXT_PRIMARY for essential values, TEXT_SECONDARY for normal labels, TEXT_MUTED for inactive labels, and TEXT_DISABLED for deep-muted UI. Avoid thick or glowing typography.</text:p>
      <text:p text:style-name="Rule_20_Body">- Toolbars should be TC2000-like: flat, compact, divided by thin vertical separators, with grey button text and subdued icons. Use color only on icons or states where meaning is required.</text:p>
      <text:p text:style-name="Rule_20_Body">- Ticker boards should use inline market text, not heavy pills. Symbol is muted, price is secondary, and % change is the strongest element through size and green/red color only. Keep fixed widths to prevent live-tick jitter.</text:p>
      <text:p text:style-name="Rule_20_Body">- Selection should use a subtle filled state such as SELECTION_BG #1A2840, calm borders, or a thin underline. Avoid bright vertical selection stripes, glowing outlines, and oversized selected containers.</text:p>
      <text:p text:style-name="Rule_20_Body">- Menus and dropdowns should use AMOLED surfaces, compact row height, muted text, clear hover/checked states, and no blank/default-looking popup areas.</text:p>
      <text:p text:style-name="Rule_20_Body">- In charts, use a deep AMOLED canvas, subtle grid lines, muted axis labels, calm crosshair labels, and market colors only where they communicate price direction or risk.</text:p>
      <text:p text:style-name="P8">AMOLED_TRUE_BLACK = "#000000"  # optional deepest toolbar/menu/chart shell<text:line-break/>AMOLED_BG_APP = "#050709"<text:line-break/>AMOLED_BG_WINDOW = "#0A0D12"<text:line-break/>AMOLED_BG_PANEL = "#0F1318"<text:line-break/>AMOLED_BORDER = "#1A2030"<text:line-break/>AMOLED_BORDER_HI = "#25344A"<text:line-break/>AMOLED_SELECTION = "#1A2840"</text:p>
      <text:p text:style-name="Standard"/>
      <text:p text:style-name="P4">Short future instruction: Use my terminal dark AMOLED UI style. This should mean true-black/dark matte surfaces, sharp borders, compact spacing, modern UI fonts and number typography, minimal repeated text, asset-aware icon buttons, subtle accents, and backend-safe production polis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style:contextual-spacing="false" fo:line-height="105%" fo:text-align="start" style:justify-single-word="false" fo:orphans="2" fo:widows="2" style:writing-mode="lr-tb"/>
      <style:text-properties fo:color="#111827" loext:opacity="100%" style:font-name="Aptos" fo:font-family="Aptos" style:font-family-generic="roman" style:font-pitch="variable" fo:font-size="9.5pt" style:font-name-asian="Aptos1" style:font-family-asian="Aptos" style:font-family-generic-asian="system" style:font-pitch-asian="variable" style:font-size-asian="9.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141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141cm" style:contextual-spacing="false" fo:keep-together="always" fo:keep-with-next="always"/>
      <style:text-properties fo:color="#111827" loext:opacity="100%" style:font-name="Calibri" fo:font-family="Calibri"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12cm" fo:margin-bottom="0.141cm" style:contextual-spacing="false" fo:keep-together="always" fo:keep-with-next="always"/>
      <style:text-properties fo:color="#111827"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141cm" style:contextual-spacing="false" fo:keep-together="always" fo:keep-with-next="always"/>
      <style:text-properties fo:color="#111827" loext:opacity="100%" style:font-name="Calibri" fo:font-family="Calibri" style:font-family-generic="roman" style:font-pitch="variable" fo:font-size="10.5pt" fo:font-weight="bold" style:font-name-asian="ＭＳ ゴシック" style:font-family-asian="'ＭＳ ゴシック'" style:font-family-generic-asian="system" style:font-pitch-asian="variable" style:font-size-asian="10.5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141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141cm" style:contextual-spacing="true" fo:text-indent="-0.635cm" style:auto-text-indent="false"/>
    </style:style>
    <style:style style:name="List_20_3_20__28_WW_29_" style:display-name="List 3 (WW)" style:family="paragraph" style:parent-style-name="Standard">
      <style:paragraph-properties fo:margin-left="1.905cm" fo:margin-top="0cm" fo:margin-bottom="0.141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141cm" style:contextual-spacing="true"/>
    </style:style>
    <style:style style:name="List_20_2" style:display-name="List 2" style:family="paragraph" style:parent-style-name="Standard" style:list-style-name="WWNum2" style:class="list">
      <style:paragraph-properties fo:margin-top="0cm" fo:margin-bottom="0.141cm" style:contextual-spacing="true"/>
    </style:style>
    <style:style style:name="List_20_3" style:display-name="List 3" style:family="paragraph" style:parent-style-name="Standard" style:list-style-name="WWNum3" style:class="list">
      <style:paragraph-properties fo:margin-top="0cm" fo:margin-bottom="0.141cm" style:contextual-spacing="true"/>
    </style:style>
    <style:style style:name="Numbering_20_1" style:display-name="Numbering 1" style:family="paragraph" style:parent-style-name="Standard" style:list-style-name="WWNum5" style:class="list">
      <style:paragraph-properties fo:margin-top="0cm" fo:margin-bottom="0.141cm" style:contextual-spacing="true"/>
    </style:style>
    <style:style style:name="Numbering_20_2" style:display-name="Numbering 2" style:family="paragraph" style:parent-style-name="Standard" style:list-style-name="WWNum6" style:class="list">
      <style:paragraph-properties fo:margin-top="0cm" fo:margin-bottom="0.141cm" style:contextual-spacing="true"/>
    </style:style>
    <style:style style:name="Numbering_20_3" style:display-name="Numbering 3" style:family="paragraph" style:parent-style-name="Standard" style:list-style-name="WWNum7" style:class="list">
      <style:paragraph-properties fo:margin-top="0cm" fo:margin-bottom="0.141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erminal_20_Code" style:display-name="Terminal Code" style:family="paragraph">
      <style:paragraph-properties fo:margin-left="0.305cm" fo:margin-right="0.305cm" fo:margin-top="0.071cm" fo:margin-bottom="0.141cm" style:contextual-spacing="false" fo:line-height="115%" fo:text-align="start" style:justify-single-word="false" fo:orphans="2" fo:widows="2" style:writing-mode="lr-tb"/>
      <style:text-properties fo:color="#e8f0ff" loext:opacity="100%" style:font-name="Consolas" fo:font-family="Consolas" style:font-family-generic="roman" style:font-pitch="variable" fo:font-size="8pt" style:font-name-asian="Consolas1" style:font-family-asian="Consolas" style:font-family-generic-asian="system" style:font-pitch-asian="variable" style:font-size-asian="8pt"/>
    </style:style>
    <style:style style:name="Small_20_Muted" style:display-name="Small Muted" style:family="paragraph">
      <style:paragraph-properties fo:margin-top="0cm" fo:margin-bottom="0.071cm" style:contextual-spacing="false" fo:line-height="115%" fo:text-align="start" style:justify-single-word="false" fo:orphans="2" fo:widows="2" style:writing-mode="lr-tb"/>
      <style:text-properties fo:color="#4b5563" loext:opacity="100%" style:font-name="Aptos" fo:font-family="Aptos" style:font-family-generic="roman" style:font-pitch="variable" fo:font-size="8.5pt" style:font-size-asian="8.5pt"/>
    </style:style>
    <style:style style:name="Callout" style:family="paragraph">
      <style:paragraph-properties fo:margin-left="0.305cm" fo:margin-right="0.305cm" fo:margin-top="0.106cm" fo:margin-bottom="0.176cm" style:contextual-spacing="false" fo:line-height="115%" fo:text-align="start" style:justify-single-word="false" fo:orphans="2" fo:widows="2" style:writing-mode="lr-tb"/>
      <style:text-properties fo:color="#111827" loext:opacity="100%" style:font-name="Aptos" fo:font-family="Aptos" style:font-family-generic="roman" style:font-pitch="variable" fo:font-size="9pt" style:font-size-asian="9pt"/>
    </style:style>
    <style:style style:name="Rule_20_Body" style:display-name="Rule Body" style:family="paragraph">
      <style:paragraph-properties fo:margin-top="0cm" fo:margin-bottom="0.106cm" style:contextual-spacing="false" fo:line-height="115%" fo:text-align="start" style:justify-single-word="false" fo:orphans="2" fo:widows="2" style:writing-mode="lr-tb"/>
      <style:text-properties fo:color="#111827" loext:opacity="100%" style:font-name="Aptos" fo:font-family="Aptos" style:font-family-generic="roman" style:font-pitch="variable" fo:font-size="9pt" style:font-size-asian="9pt"/>
    </style:style>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fo:color="#5a7090" loext:opacity="100%" style:font-name="Consolas" fo:font-size="7.5pt" fo:font-weight="bold" style:font-name-asian="Consolas1" style:font-size-asian="7.5pt" style:font-weight-asian="bold"/>
    </style:style>
    <style:style style:name="MP2" style:family="paragraph" style:parent-style-name="Footer">
      <style:paragraph-properties fo:text-align="center" style:justify-single-word="false"/>
      <style:text-properties fo:color="#6b7280" loext:opacity="100%" style:font-name="Aptos" fo:font-size="7.5pt" fo:font-weight="normal" style:font-name-asian="Aptos1" style:font-size-asian="7.5pt" style:font-weight-asian="normal"/>
    </style:style>
    <style:page-layout style:name="Mpm1">
      <style:page-layout-properties fo:page-width="21.59cm" fo:page-height="27.94cm" style:num-format="1" style:print-orientation="portrait" fo:margin-top="1.27cm" fo:margin-bottom="1.27cm" fo:margin-left="1.727cm" fo:margin-right="1.727cm" style:writing-mode="lr-tb" style:layout-grid-color="#c0c0c0" style:layout-grid-lines="39" style:layout-grid-base-height="0.635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05cm" fo:margin-left="0cm" fo:margin-right="0cm" fo:margin-bottom="0.205cm" style:dynamic-spacing="true"/>
      </style:header-style>
      <style:footer-style>
        <style:header-footer-properties fo:min-height="0.305cm" fo:margin-left="0cm" fo:margin-right="0cm" fo:margin-top="0.20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STITUTIONAL DARK TRADING TERMINAL UI</text:p>
      </style:header>
      <style:footer>
        <text:p text:style-name="MP2">UI consistency guide - trading terminal design system</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itutional Dark Trading Terminal UI Guide</dc:title>
    <dc:subject>UI consistency rules for trading terminal dialogs and widgets</dc:subject>
    <meta:initial-creator>ChatGPT</meta:initial-creator>
    <dc:description>Generated design system guide based on the user's trading terminal UI direction.</dc:description>
    <meta:editing-cycles>5</meta:editing-cycles>
    <meta:creation-date>2013-12-23T23:15:00</meta:creation-date>
    <dc:date>2026-05-23T11:05:56.584439408</dc:date>
    <meta:editing-duration>PT5M39S</meta:editing-duration>
    <meta:generator>LibreOffice/24.2.7.2$Linux_X86_64 LibreOffice_project/420$Build-2</meta:generator>
    <meta:document-statistic meta:table-count="8" meta:image-count="0" meta:object-count="0" meta:page-count="8" meta:paragraph-count="247" meta:word-count="1875" meta:character-count="12591" meta:non-whitespace-character-count="10857"/>
    <meta:user-defined meta:name="AppVersion">14.0000</meta:user-defined>
    <meta:template xlink:type="simple" xlink:actuate="onRequest" xlink:title="Normal.dotm" xlink:href=""/>
  </office:meta>
</office:document-meta>
</file>